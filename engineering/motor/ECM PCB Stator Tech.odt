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Inter, 'SF Pro', Roboto, 'Helvetica Neue', Helvetica, Tahoma, Arial, 'PingFang SC', 'Microsoft YaHei'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-0.4cm" fo:margin-right="-0.499cm" fo:margin-top="0cm" fo:margin-bottom="0.212cm" style:contextual-spacing="false" fo:text-align="center" style:justify-single-word="false" fo:orphans="2" fo:widows="2" fo:text-indent="0cm" style:auto-text-indent="false" style:page-number="auto" fo:background-color="transparent" fo:keep-with-next="always"/>
      <style:text-properties fo:font-variant="normal" fo:text-transform="none" fo:color="#222222" loext:opacity="100%" style:font-name="Noto Sans" fo:font-size="18pt" fo:letter-spacing="normal" fo:font-style="normal" fo:font-weight="bold" officeooo:paragraph-rsid="00169014" style:font-size-asian="18pt" style:font-size-complex="18pt"/>
    </style:style>
    <style:style style:name="P2" style:family="paragraph" style:parent-style-name="Heading_20_1">
      <loext:graphic-properties draw:fill="none"/>
      <style:paragraph-properties fo:margin-left="-0.4cm" fo:margin-right="-0.499cm" fo:margin-top="0cm" fo:margin-bottom="0.212cm" style:contextual-spacing="false" fo:text-align="center" style:justify-single-word="false" fo:orphans="2" fo:widows="2" fo:text-indent="0cm" style:auto-text-indent="false" fo:background-color="transparent"/>
      <style:text-properties fo:font-variant="normal" fo:text-transform="none" fo:color="#222222" loext:opacity="100%" style:font-name="Noto Sans" fo:font-size="18pt" fo:letter-spacing="normal" fo:font-style="normal" fo:font-weight="bold" officeooo:paragraph-rsid="00169014" style:font-size-asian="18pt" style:font-size-complex="1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/>
    </style:style>
    <style:style style:name="P4" style:family="paragraph" style:parent-style-name="Horizontal_20_Line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40%" fo:text-align="center" style:justify-single-word="false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center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40%" fo:text-align="center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40%" fo:text-align="center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line-height="175%" fo:orphans="2" fo:widows="2" fo:text-indent="0cm" style:auto-text-indent="false"/>
      <style:text-properties fo:font-variant="normal" fo:text-transform="none" fo:color="#222222" loext:opacity="100%" style:font-name="Noto Sans" fo:font-size="10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.212cm" fo:margin-bottom="0.212cm" style:contextual-spacing="false" fo:line-height="175%" fo:orphans="2" fo:widows="2" fo:text-indent="0cm" style:auto-text-indent="false"/>
      <style:text-properties fo:font-variant="normal" fo:text-transform="none" fo:color="#222222" loext:opacity="100%" style:font-name="Noto Sans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/>
      <style:text-properties fo:font-variant="normal" fo:text-transform="none" fo:color="#222222" loext:opacity="100%" style:font-name="Noto Sans" fo:font-size="10.5pt" fo:letter-spacing="normal" fo:font-style="normal" fo:font-weight="bold" officeooo:paragraph-rsid="0015272f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/>
      <style:text-properties fo:font-variant="normal" fo:text-transform="none" fo:color="#222222" loext:opacity="100%" style:font-name="Noto Sans" fo:font-size="10.5pt" fo:letter-spacing="normal" fo:font-style="normal" fo:font-weight="bold" officeooo:rsid="0015272f" officeooo:paragraph-rsid="0015272f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222222" loext:opacity="100%" style:font-name="Noto Sans" fo:font-size="10.5pt" fo:letter-spacing="normal" fo:font-style="normal" fo:font-weight="bold"/>
    </style:style>
    <style:style style:name="T2" style:family="text">
      <style:text-properties fo:font-variant="normal" fo:text-transform="none" fo:color="#222222" loext:opacity="100%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Noto 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variant="normal" fo:text-transform="none" fo:color="#222222" loext:opacity="100%" style:font-name="Noto Sans" fo:font-size="10.5pt" fo:letter-spacing="normal" fo:font-style="normal" fo:font-weight="normal" officeooo:rsid="0015272f"/>
    </style:style>
    <style:style style:name="T5" style:family="text">
      <style:text-properties fo:font-variant="normal" fo:text-transform="none" fo:color="#000080" loext:opacity="100%" style:text-line-through-style="none" style:text-line-through-type="none" style:font-name="Noto Sans" fo:font-size="9pt" fo:letter-spacing="normal" fo:font-style="normal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222222" loext:opacity="100%" style:font-name="Noto Sans" fo:font-size="13.5pt" fo:letter-spacing="normal" fo:font-style="normal" fo:font-weight="bold"/>
    </style:style>
    <style:style style:name="T7" style:family="text">
      <style:text-properties fo:font-variant="normal" fo:text-transform="none" fo:color="#767676" loext:opacity="100%" style:text-line-through-style="none" style:text-line-through-type="none" style:font-name="Noto Sans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tnership Proposal: </text:h>
      <text:h text:style-name="P2" text:outline-level="1">THE CHINOOK &amp; ECM PCB Stator Tech</text:h>
      <text:p text:style-name="P3"><text:span text:style-name="Strong_20_Emphasis"><text:span text:style-name="T1">To</text:span></text:span><text:span text:style-name="T2">: </text:span><text:a xlink:type="simple" xlink:href="mailto:inquiries@pcbstator.com?requestId=AI_Web_4500050031336_1772453593744" office:target-frame-name="_blank" xlink:show="new" text:style-name="Internet_20_link" text:visited-style-name="Visited_20_Internet_20_Link"><text:span text:style-name="T3">inquiries@pcbstator.com</text:span></text:a><text:span text:style-name="T2"> </text:span><text:span text:style-name="Strong_20_Emphasis"><text:span text:style-name="T1">Cc</text:span></text:span><text:span text:style-name="T2">: </text:span><text:a xlink:type="simple" xlink:href="mailto:info@pcbstator.com?requestId=AI_Web_4500050031336_1772453593744" office:target-frame-name="_blank" xlink:show="new" text:style-name="Internet_20_link" text:visited-style-name="Visited_20_Internet_20_Link"><text:span text:style-name="T3">info@pcbstator.com</text:span></text:a><text:span text:style-name="T2"> </text:span><text:span text:style-name="Strong_20_Emphasis"><text:span text:style-name="T1">From</text:span></text:span><text:span text:style-name="T2">: </text:span><text:span text:style-name="T4">David Murphy, Team Leader, Chinook Project <text:s/></text:span><text:span text:style-name="Strong_20_Emphasis"><text:span text:style-name="T1">Subject</text:span></text:span><text:span text:style-name="T2">: Partnership &amp; Evaluation Kit Inquiry: THE CHINOOK 500W Vancouver Bamboo Rickshaw Project</text:span></text:p>
      <text:p text:style-name="P4"/>
      <text:p text:style-name="P3"><text:span text:style-name="Strong_20_Emphasis"><text:span text:style-name="T1">Dear ECM PCB Stator Tech Team,</text:span></text:span></text:p>
      <text:p text:style-name="P5"><text:span text:style-name="T2">I am writing to formally propose a technology partnership between </text:span><text:span text:style-name="Strong_20_Emphasis"><text:span text:style-name="T1">THE CHINOOK</text:span></text:span><text:span text:style-name="T2"> urban mobility project and </text:span><text:span text:style-name="Strong_20_Emphasis"><text:span text:style-name="T1">ECM PCB Stator Tech</text:span></text:span><text:span text:style-name="T2">. We are requesting a quote for a </text:span><text:span text:style-name="Strong_20_Emphasis"><text:span text:style-name="T1">PCB Stator Evaluation Kit</text:span></text:span><text:span text:style-name="T2"> </text:span><text:a xlink:type="simple" xlink:href="https://www.youtube.com/watch?requestId=AI_Web_4500050031336_1772453593744&amp;v=hpTdDU613y4" office:target-frame-name="_blank" xlink:show="new" text:style-name="Internet_20_link" text:visited-style-name="Visited_20_Internet_20_Link"><text:span text:style-name="Citation"><text:span text:style-name="T5">Youtube</text:span></text:span></text:a><text:a xlink:type="simple" xlink:href="https://pcbstator.com/pcb-stator-evaluation-motors/?requestId=AI_Web_4500050031336_1772453593744" office:target-frame-name="_blank" xlink:show="new" text:style-name="Internet_20_link" text:visited-style-name="Visited_20_Internet_20_Link"><text:span text:style-name="Citation"><text:span text:style-name="T5">Pcbstator</text:span></text:span></text:a><text:span text:style-name="T2"> as we move into the prototyping phase of our sustainable, high-performance pedicab designed for the Vancouver, BC market.</text:span></text:p>
      <text:h text:style-name="P6" text:outline-level="3"><text:span text:style-name="Strong_20_Emphasis"><text:span text:style-name="T6">1. PROJECT OVERVIEW: THE CHINOOK</text:span></text:span></text:h>
      <text:p text:style-name="P3"><text:span text:style-name="T2">"The Chinook" is more than a rickshaw; it is a </text:span><text:span text:style-name="Strong_20_Emphasis"><text:span text:style-name="T1">high-performance, carbon-neutral vehicle</text:span></text:span><text:span text:style-name="T2"> designed to bridge the gap between bicycles and cars. Built with a </text:span><text:span text:style-name="Strong_20_Emphasis"><text:span text:style-name="T1">14-layer laminated bamboo monocoque frame</text:span></text:span><text:span text:style-name="T2"> reinforced with a unidirectional carbon fiber core, it achieves a strength-to-weight ratio up to 40% better than steel.</text:span></text:p>
      <text:list text:style-name="L1">
        <text:list-item>
          <text:p text:style-name="P7"><text:span text:style-name="Strong_20_Emphasis"><text:span text:style-name="T1">Social Mission</text:span></text:span><text:span text:style-name="T2">: Empowering local job seekers through sustainable urban tours and deliveries.</text:span></text:p>
        </text:list-item>
        <text:list-item>
          <text:p text:style-name="P8"><text:span text:style-name="Strong_20_Emphasis"><text:span text:style-name="T1">Engineering Philosophy</text:span></text:span><text:span text:style-name="T2">: "Overbuilt for Safety" with an artisanal finish, utilizing local Vancouver supply chains including </text:span><text:span text:style-name="Strong_20_Emphasis"><text:span text:style-name="T1">Coolite Bamboo</text:span></text:span><text:span text:style-name="T2"> and </text:span><text:span text:style-name="Strong_20_Emphasis"><text:span text:style-name="T1">UBC Forestry</text:span></text:span><text:span text:style-name="T2">. </text:span><text:a xlink:type="simple" xlink:href="https://m.yelp.com/biz/coolite-bamboo-products-vancouver?requestId=AI_Web_4500050031336_1772453593744" office:target-frame-name="_blank" xlink:show="new" text:style-name="Internet_20_link" text:visited-style-name="Visited_20_Internet_20_Link"><text:span text:style-name="Citation"><text:span text:style-name="T5">Yelp</text:span></text:span></text:a><text:a xlink:type="simple" xlink:href="https://bamboo.forestry.ubc.ca/about/?requestId=AI_Web_4500050031336_1772453593744" office:target-frame-name="_blank" xlink:show="new" text:style-name="Internet_20_link" text:visited-style-name="Visited_20_Internet_20_Link"><text:span text:style-name="Citation"><text:span text:style-name="T5">Ubc</text:span></text:span></text:a></text:p>
        </text:list-item>
      </text:list>
      <text:h text:style-name="P6" text:outline-level="3"><text:span text:style-name="Strong_20_Emphasis"><text:span text:style-name="T6">2. TECHNICAL SYNERGY &amp; SPECIFICATIONS</text:span></text:span></text:h>
      <text:p text:style-name="P5"><text:span text:style-name="T2">Our project is uniquely positioned to showcase the benefits of your </text:span><text:span text:style-name="Strong_20_Emphasis"><text:span text:style-name="T1">70% lighter axial flux motor technology</text:span></text:span><text:span text:style-name="T2"> </text:span><text:a xlink:type="simple" xlink:href="https://pcbstator.com/case-studies/ecm-evaluates-the-impact-of-pcb-stator-technology-in-electric-vehicles/?requestId=AI_Web_4500050031336_1772453593744" office:target-frame-name="_blank" xlink:show="new" text:style-name="Internet_20_link" text:visited-style-name="Visited_20_Internet_20_Link"><text:span text:style-name="Citation"><text:span text:style-name="T5">Pcbstator</text:span></text:span></text:a><text:a xlink:type="simple" xlink:href="https://pcbstator.com/?requestId=AI_Web_4500050031336_1772453593744" office:target-frame-name="_blank" xlink:show="new" text:style-name="Internet_20_link" text:visited-style-name="Visited_20_Internet_20_Link"><text:span text:style-name="Citation"><text:span text:style-name="T5">Pcbstator</text:span></text:span></text:a><text:span text:style-name="T2"> within the constraints of strict urban regulations.</text:span></text:p>
      <text:list text:style-name="L2">
        <text:list-item>
          <text:p text:style-name="P9"><text:span text:style-name="Strong_20_Emphasis"><text:span text:style-name="T1">Vancouver Power Cap</text:span></text:span><text:span text:style-name="T2">: Strict </text:span><text:span text:style-name="Strong_20_Emphasis"><text:span text:style-name="T1">500W continuous rating</text:span></text:span><text:span text:style-name="T2">. </text:span><text:a xlink:type="simple" xlink:href="https://www2.gov.bc.ca/gov/content/transportation/driving-and-cycling/cycling/cycling-regulations-restrictions-rules/e-bikes?requestId=AI_Web_4500050031336_1772453593744" office:target-frame-name="_blank" xlink:show="new" text:style-name="Internet_20_link" text:visited-style-name="Visited_20_Internet_20_Link"><text:span text:style-name="Citation"><text:span text:style-name="T7">Bc</text:span></text:span></text:a><text:span text:style-name="T2"> Every gram of motor weight saved directly increases our hill-climbing torque and passenger payload capacity.</text:span></text:p>
        </text:list-item>
        <text:list-item>
          <text:p text:style-name="P9"><text:span text:style-name="Strong_20_Emphasis"><text:span text:style-name="T1">Electrical Stability</text:span></text:span><text:span text:style-name="T2">: We use a </text:span><text:span text:style-name="Strong_20_Emphasis"><text:span text:style-name="T1">48V Lead-Acid (Deep-Cycle AGM)</text:span></text:span><text:span text:style-name="T2"> array. </text:span><text:a xlink:type="simple" xlink:href="https://canbat.com/deep-cycle-batteries/?requestId=AI_Web_4500050031336_1772453593744&amp;srsltid=AfmBOorrJ3MZhrHb-Qgas92ETsyEAxSvA6J3emlyani4mYgPOW7ZHume" office:target-frame-name="_blank" xlink:show="new" text:style-name="Internet_20_link" text:visited-style-name="Visited_20_Internet_20_Link"><text:span text:style-name="Citation"><text:span text:style-name="T7">Canbat</text:span></text:span></text:a><text:span text:style-name="T2"> The high capacitance and low internal resistance of this system provide an exceptionally stable voltage environment, protecting your delicate PCB stator electronics from "spikey" regulation or transient damage. </text:span><text:a xlink:type="simple" xlink:href="https://batterycouncil.org/news/article/auto-batteries-lca-lead-battery-manufacturing-has-significantly-lower-environmental-impact-than-lithium-iron-phosphate/?requestId=AI_Web_4500050031336_1772453593744" office:target-frame-name="_blank" xlink:show="new" text:style-name="Internet_20_link" text:visited-style-name="Visited_20_Internet_20_Link"><text:span text:style-name="Citation"><text:span text:style-name="T7">Batterycouncil</text:span></text:span></text:a></text:p>
        </text:list-item>
        <text:list-item>
          <text:p text:style-name="P10"><text:span text:style-name="Strong_20_Emphasis"><text:span text:style-name="T1">Chassis Design</text:span></text:span><text:span text:style-name="T2">: A streamlined, aerodynamic passenger canopy designed for the Pacific Northwest climate.</text:span></text:p>
        </text:list-item>
      </text:list>
      <text:h text:style-name="P6" text:outline-level="3"><text:soft-page-break/><text:span text:style-name="Strong_20_Emphasis"><text:span text:style-name="T6"/></text:span></text:h>
      <text:h text:style-name="P6" text:outline-level="3"><text:span text:style-name="Strong_20_Emphasis"><text:span text:style-name="T6">3. PARTNERSHIP &amp; SCALING</text:span></text:span></text:h>
      <text:p text:style-name="P5"><text:span text:style-name="T2">We are seeking a </text:span><text:span text:style-name="Strong_20_Emphasis"><text:span text:style-name="T1">long-term technology partner</text:span></text:span><text:span text:style-name="T2"> to help us redefine urban transit. </text:span><text:a xlink:type="simple" xlink:href="https://tphglobal.com/uk/the-pros-and-cons-of-exclusivity-deals-in-business-relationships/?requestId=AI_Web_4500050031336_1772453593744" office:target-frame-name="_blank" xlink:show="new" text:style-name="Internet_20_link" text:visited-style-name="Visited_20_Internet_20_Link"><text:span text:style-name="Citation"><text:span text:style-name="T7">Tphglobal</text:span></text:span></text:a></text:p>
      <text:list text:style-name="L3">
        <text:list-item>
          <text:p text:style-name="P11"><text:span text:style-name="Strong_20_Emphasis"><text:span text:style-name="T1">"Our Designs" Transparency</text:span></text:span><text:span text:style-name="T2">: As a mission-driven project, we are developing a transparent "Build Guide." We would be honored to feature ECM as our </text:span><text:span text:style-name="Strong_20_Emphasis"><text:span text:style-name="T1">Official Stator Partner</text:span></text:span><text:span text:style-name="T2">, showcasing your tech to the DIY and sustainable transport communities. </text:span><text:a xlink:type="simple" xlink:href="https://www.academia.edu/21636744/SME_brand_building_and_management_an_exploratory_study?requestId=AI_Web_4500050031336_1772453593744" office:target-frame-name="_blank" xlink:show="new" text:style-name="Internet_20_link" text:visited-style-name="Visited_20_Internet_20_Link"><text:span text:style-name="Citation"><text:span text:style-name="T7">Academia</text:span></text:span></text:a></text:p>
        </text:list-item>
        <text:list-item>
          <text:p text:style-name="P12"><text:span text:style-name="Strong_20_Emphasis"><text:span text:style-name="T1">Order Volume</text:span></text:span><text:span text:style-name="T2">: Following receipt of the evaluation sample and pending financing approval, we anticipate an initial production order of </text:span><text:span text:style-name="Strong_20_Emphasis"><text:span text:style-name="T1">10 units</text:span></text:span><text:span text:style-name="T2"> to launch our first tour fleet.</text:span></text:p>
        </text:list-item>
        <text:list-item>
          <text:p text:style-name="P11"><text:span text:style-name="Strong_20_Emphasis"><text:span text:style-name="T1">Prototyping Access</text:span></text:span><text:span text:style-name="T2">: We are in discussions with the </text:span><text:span text:style-name="Strong_20_Emphasis"><text:span text:style-name="T1">UBC Centre for Advanced Wood Processing (CAWP)</text:span></text:span><text:span text:style-name="T2"> for build space and structural validation. </text:span><text:a xlink:type="simple" xlink:href="https://bamboo.forestry.ubc.ca/about/?requestId=AI_Web_4500050031336_1772453593744" office:target-frame-name="_blank" xlink:show="new" text:style-name="Internet_20_link" text:visited-style-name="Visited_20_Internet_20_Link"><text:span text:style-name="Citation"><text:span text:style-name="T5">Ubc</text:span></text:span></text:a><text:a xlink:type="simple" xlink:href="https://twigbc.ca/cawp/?requestId=AI_Web_4500050031336_1772453593744" office:target-frame-name="_blank" xlink:show="new" text:style-name="Internet_20_link" text:visited-style-name="Visited_20_Internet_20_Link"><text:span text:style-name="Citation"><text:span text:style-name="T5">Twigbc</text:span></text:span></text:a></text:p>
        </text:list-item>
      </text:list>
      <text:h text:style-name="P6" text:outline-level="3"><text:span text:style-name="Strong_20_Emphasis"><text:span text:style-name="T6">4. SUPPORTING DOCUMENTATION</text:span></text:span></text:h>
      <text:p text:style-name="P3"><text:span text:style-name="T2">Attached for your review is the </text:span><text:span text:style-name="Strong_20_Emphasis"><text:span text:style-name="T1">THE CHINOOK Information Kit</text:span></text:span><text:span text:style-name="T2"> , which details our:</text:span></text:p>
      <text:list text:style-name="L4">
        <text:list-item>
          <text:p text:style-name="P13"><text:span text:style-name="Strong_20_Emphasis"><text:span text:style-name="T1">Marketing &amp; Business Plan</text:span></text:span><text:span text:style-name="T2">: 6-month revenue forecasts and local partnership network.</text:span></text:p>
        </text:list-item>
        <text:list-item>
          <text:p text:style-name="P13"><text:span text:style-name="Strong_20_Emphasis"><text:span text:style-name="T1">Fabrication Manual</text:span></text:span><text:span text:style-name="T2">: Laminated bamboo methods and Finite Element Analysis (FEA) targets.</text:span></text:p>
        </text:list-item>
        <text:list-item>
          <text:p text:style-name="P13"><text:span text:style-name="Strong_20_Emphasis"><text:span text:style-name="T1">Design Intent</text:span></text:span><text:span text:style-name="T2">: High-resolution visuals of the chassis and canopy integration.</text:span></text:p>
        </text:list-item>
      </text:list>
      <text:p text:style-name="P14">We believe your PCB Stator technology is the missing piece in creating the world’s most efficient urban taxi. We look forward to discussing the next steps for an evaluation motor kit.</text:p>
      <text:p text:style-name="P15">Sincerely,</text:p>
      <text:p text:style-name="P16">David Murphy </text:p>
      <text:p text:style-name="P17">(Team Leader) Chinook Project</text:p>
      <text:p text:style-name="P16">Phone: (1)778-675-3306 </text:p>
      <text:p text:style-name="P16">Address: 19-832 East Pender Street </text:p>
      <text:p text:style-name="P16">Vancouver, BC, Canada, V6A 1W1</text:p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Inter, 'SF Pro', Roboto, 'Helvetica Neue', Helvetica, Tahoma, Arial, 'PingFang SC', 'Microsoft YaHei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3:41:59.818780600</meta:creation-date>
    <meta:editing-duration>PT1M38S</meta:editing-duration>
    <meta:editing-cycles>2</meta:editing-cycles>
    <meta:generator>LibreOffice/25.8.3.2$Windows_X86_64 LibreOffice_project/8ca8d55c161d602844f5428fa4b58097424e324e</meta:generator>
    <dc:date>2026-03-04T23:42:30.312655700</dc:date>
    <meta:document-statistic meta:table-count="0" meta:image-count="0" meta:object-count="0" meta:page-count="2" meta:paragraph-count="32" meta:word-count="495" meta:character-count="3370" meta:non-whitespace-character-count="2911"/>
  </office:meta>
</office:document-meta>
</file>