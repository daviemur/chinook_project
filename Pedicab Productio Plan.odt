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1000000010E4BD1997.png" manifest:media-type="image/png"/>
  <manifest:file-entry manifest:full-path="Pictures/100000000000012C0000012C9837B979.png" manifest:media-type="image/png"/>
  <manifest:file-entry manifest:full-path="Pictures/100000000000012C0000012CEE3845AE.png" manifest:media-type="image/png"/>
  <manifest:file-entry manifest:full-path="Pictures/100000010000001C0000001CBBED62E2.png" manifest:media-type="image/png"/>
  <manifest:file-entry manifest:full-path="Pictures/1000000100000060000000605F65D74E.png" manifest:media-type="image/png"/>
  <manifest:file-entry manifest:full-path="Pictures/100000000000012C0000012CCF4C2302.png" manifest:media-type="image/png"/>
  <manifest:file-entry manifest:full-path="Pictures/100000000000012C0000012C396A488D.png" manifest:media-type="image/png"/>
  <manifest:file-entry manifest:full-path="Pictures/100000000000001C0000001CC0E54F40.png" manifest:media-type="image/png"/>
  <manifest:file-entry manifest:full-path="Pictures/100000000000012C0000012CD65EAC4B.png" manifest:media-type="image/png"/>
  <manifest:file-entry manifest:full-path="Pictures/100000000000001C0000001CE06020A1.png" manifest:media-type="image/png"/>
  <manifest:file-entry manifest:full-path="Pictures/100000000000001C0000001CE9DD5BCF.png" manifest:media-type="image/png"/>
  <manifest:file-entry manifest:full-path="Pictures/1000000000000020000000205396F548.png" manifest:media-type="image/png"/>
  <manifest:file-entry manifest:full-path="Pictures/100000000000001C0000001C72A03D18.png" manifest:media-type="image/png"/>
  <manifest:file-entry manifest:full-path="Pictures/100000010000001C0000001C14A72F67.png" manifest:media-type="image/png"/>
  <manifest:file-entry manifest:full-path="Pictures/100000000000001C0000001C6C7B8303.png" manifest:media-type="image/png"/>
  <manifest:file-entry manifest:full-path="Pictures/100000010000001C0000001C838AA043.png" manifest:media-type="image/png"/>
  <manifest:file-entry manifest:full-path="Pictures/100000000000001C0000001CCDEDE242.png" manifest:media-type="image/png"/>
  <manifest:file-entry manifest:full-path="Pictures/100000000000012C0000012CCEF0F36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Inter, 'SF Pro', Roboto, 'Helvetica Neue', Helvetica, Tahoma, Arial, 'PingFang SC', 'Microsoft YaHei'"/>
    <style:font-face style:name="OpenSymbol" svg:font-family="OpenSymbol" style:font-charset="x-symbol"/>
  </office:font-face-decls>
  <office:automatic-styles>
    <style:style style:name="Table1" style:family="table">
      <style:table-properties style:width="12.506cm" table:align="left"/>
    </style:style>
    <style:style style:name="Table1.A" style:family="table-column">
      <style:table-column-properties style:column-width="3.42cm"/>
    </style:style>
    <style:style style:name="Table1.B" style:family="table-column">
      <style:table-column-properties style:column-width="9.086cm"/>
    </style:style>
    <style:style style:name="Table1.A1" style:family="table-cell">
      <style:table-cell-properties style:vertical-align="middle" fo:background-color="#f2f2f2" fo:padding-left="0.318cm" fo:padding-right="0.318cm" fo:padding-top="0.159cm" fo:padding-bottom="0.159cm" fo:border="0.05pt solid #dddddd">
        <style:background-image/>
      </style:table-cell-properties>
    </style:style>
    <style:style style:name="Table1.A2" style:family="table-cell">
      <style:table-cell-properties style:vertical-align="middle" fo:padding-left="0.318cm" fo:padding-right="0.318cm" fo:padding-top="0.159cm" fo:padding-bottom="0.159cm" fo:border="0.05pt solid #dddddd"/>
    </style:style>
    <style:style style:name="Table1.B2" style:family="table-cell">
      <style:table-cell-properties style:vertical-align="middle" fo:padding-left="0.318cm" fo:padding-right="0.318cm" fo:padding-top="0.159cm" fo:padding-bottom="0.159cm" fo:border="0.05pt solid #dddddd"/>
    </style:style>
    <style:style style:name="Table1.A3" style:family="table-cell">
      <style:table-cell-properties style:vertical-align="middle" fo:padding-left="0.318cm" fo:padding-right="0.318cm" fo:padding-top="0.159cm" fo:padding-bottom="0.159cm" fo:border="0.05pt solid #dddddd"/>
    </style:style>
    <style:style style:name="Table1.B3" style:family="table-cell">
      <style:table-cell-properties style:vertical-align="middle" fo:padding-left="0.318cm" fo:padding-right="0.318cm" fo:padding-top="0.159cm" fo:padding-bottom="0.159cm" fo:border="0.05pt solid #dddddd"/>
    </style:style>
    <style:style style:name="Table1.A4" style:family="table-cell">
      <style:table-cell-properties style:vertical-align="middle" fo:padding-left="0.318cm" fo:padding-right="0.318cm" fo:padding-top="0.159cm" fo:padding-bottom="0.159cm" fo:border="0.05pt solid #dddddd"/>
    </style:style>
    <style:style style:name="Table1.B4" style:family="table-cell">
      <style:table-cell-properties style:vertical-align="middle" fo:padding-left="0.318cm" fo:padding-right="0.318cm" fo:padding-top="0.159cm" fo:padding-bottom="0.159cm" fo:border="0.05pt solid #dddddd"/>
    </style:style>
    <style:style style:name="Table1.A5" style:family="table-cell">
      <style:table-cell-properties style:vertical-align="middle" fo:padding-left="0.318cm" fo:padding-right="0.318cm" fo:padding-top="0.159cm" fo:padding-bottom="0.159cm" fo:border="0.05pt solid #dddddd"/>
    </style:style>
    <style:style style:name="Table1.B5" style:family="table-cell">
      <style:table-cell-properties style:vertical-align="middle" fo:padding-left="0.318cm" fo:padding-right="0.318cm" fo:padding-top="0.159cm" fo:padding-bottom="0.159cm" fo:border="0.05pt solid #dddddd"/>
    </style:style>
    <style:style style:name="Table1.A6" style:family="table-cell">
      <style:table-cell-properties style:vertical-align="middle" fo:padding-left="0.318cm" fo:padding-right="0.318cm" fo:padding-top="0.159cm" fo:padding-bottom="0.159cm" fo:border="0.05pt solid #dddddd"/>
    </style:style>
    <style:style style:name="Table1.B6" style:family="table-cell">
      <style:table-cell-properties style:vertical-align="middle" fo:padding-left="0.318cm" fo:padding-right="0.318cm" fo:padding-top="0.159cm" fo:padding-bottom="0.159cm" fo:border="0.05pt solid #dddddd"/>
    </style:style>
    <style:style style:name="Table1.A7" style:family="table-cell">
      <style:table-cell-properties style:vertical-align="middle" fo:padding-left="0.318cm" fo:padding-right="0.318cm" fo:padding-top="0.159cm" fo:padding-bottom="0.159cm" fo:border="0.05pt solid #dddddd"/>
    </style:style>
    <style:style style:name="Table1.B7" style:family="table-cell">
      <style:table-cell-properties style:vertical-align="middle" fo:padding-left="0.318cm" fo:padding-right="0.318cm" fo:padding-top="0.159cm" fo:padding-bottom="0.159cm" fo:border="0.05pt solid #dddddd"/>
    </style:style>
    <style:style style:name="Table1.A8" style:family="table-cell">
      <style:table-cell-properties style:vertical-align="middle" fo:padding-left="0.318cm" fo:padding-right="0.318cm" fo:padding-top="0.159cm" fo:padding-bottom="0.159cm" fo:border="0.05pt solid #dddddd"/>
    </style:style>
    <style:style style:name="Table1.B8" style:family="table-cell">
      <style:table-cell-properties style:vertical-align="middle" fo:padding-left="0.318cm" fo:padding-right="0.318cm" fo:padding-top="0.159cm" fo:padding-bottom="0.159cm" fo:border="0.05pt solid #dddddd"/>
    </style:style>
    <style:style style:name="Table2" style:family="table">
      <style:table-properties style:width="17.59cm" table:align="left"/>
    </style:style>
    <style:style style:name="Table2.A" style:family="table-column">
      <style:table-column-properties style:column-width="2.485cm"/>
    </style:style>
    <style:style style:name="Table2.B" style:family="table-column">
      <style:table-column-properties style:column-width="7.578cm"/>
    </style:style>
    <style:style style:name="Table2.C" style:family="table-column">
      <style:table-column-properties style:column-width="7.527cm"/>
    </style:style>
    <style:style style:name="Table2.A1" style:family="table-cell">
      <style:table-cell-properties style:vertical-align="middle" fo:background-color="#f2f2f2" fo:padding-left="0.318cm" fo:padding-right="0.318cm" fo:padding-top="0.159cm" fo:padding-bottom="0.159cm" fo:border="0.05pt solid #dddddd">
        <style:background-image/>
      </style:table-cell-properties>
    </style:style>
    <style:style style:name="Table2.A2" style:family="table-cell">
      <style:table-cell-properties style:vertical-align="middle" fo:padding-left="0.318cm" fo:padding-right="0.318cm" fo:padding-top="0.159cm" fo:padding-bottom="0.159cm" fo:border="0.05pt solid #dddddd"/>
    </style:style>
    <style:style style:name="Table2.B2" style:family="table-cell">
      <style:table-cell-properties style:vertical-align="middle" fo:padding-left="0.318cm" fo:padding-right="0.318cm" fo:padding-top="0.159cm" fo:padding-bottom="0.159cm" fo:border="0.05pt solid #dddddd"/>
    </style:style>
    <style:style style:name="Table2.C2" style:family="table-cell">
      <style:table-cell-properties style:vertical-align="middle" fo:padding-left="0.318cm" fo:padding-right="0.318cm" fo:padding-top="0.159cm" fo:padding-bottom="0.159cm" fo:border="0.05pt solid #dddddd"/>
    </style:style>
    <style:style style:name="Table2.A3" style:family="table-cell">
      <style:table-cell-properties style:vertical-align="middle" fo:padding-left="0.318cm" fo:padding-right="0.318cm" fo:padding-top="0.159cm" fo:padding-bottom="0.159cm" fo:border="0.05pt solid #dddddd"/>
    </style:style>
    <style:style style:name="Table2.B3" style:family="table-cell">
      <style:table-cell-properties style:vertical-align="middle" fo:padding-left="0.318cm" fo:padding-right="0.318cm" fo:padding-top="0.159cm" fo:padding-bottom="0.159cm" fo:border="0.05pt solid #dddddd"/>
    </style:style>
    <style:style style:name="Table2.C3" style:family="table-cell">
      <style:table-cell-properties style:vertical-align="middle" fo:padding-left="0.318cm" fo:padding-right="0.318cm" fo:padding-top="0.159cm" fo:padding-bottom="0.159cm" fo:border="0.05pt solid #dddddd"/>
    </style:style>
    <style:style style:name="Table2.A4" style:family="table-cell">
      <style:table-cell-properties style:vertical-align="middle" fo:padding-left="0.318cm" fo:padding-right="0.318cm" fo:padding-top="0.159cm" fo:padding-bottom="0.159cm" fo:border="0.05pt solid #dddddd"/>
    </style:style>
    <style:style style:name="Table2.B4" style:family="table-cell">
      <style:table-cell-properties style:vertical-align="middle" fo:padding-left="0.318cm" fo:padding-right="0.318cm" fo:padding-top="0.159cm" fo:padding-bottom="0.159cm" fo:border="0.05pt solid #dddddd"/>
    </style:style>
    <style:style style:name="Table2.C4" style:family="table-cell">
      <style:table-cell-properties style:vertical-align="middle" fo:padding-left="0.318cm" fo:padding-right="0.318cm" fo:padding-top="0.159cm" fo:padding-bottom="0.159cm" fo:border="0.05pt solid #dddddd"/>
    </style:style>
    <style:style style:name="Table2.A5" style:family="table-cell">
      <style:table-cell-properties style:vertical-align="middle" fo:padding-left="0.318cm" fo:padding-right="0.318cm" fo:padding-top="0.159cm" fo:padding-bottom="0.159cm" fo:border="0.05pt solid #dddddd"/>
    </style:style>
    <style:style style:name="Table2.B5" style:family="table-cell">
      <style:table-cell-properties style:vertical-align="middle" fo:padding-left="0.318cm" fo:padding-right="0.318cm" fo:padding-top="0.159cm" fo:padding-bottom="0.159cm" fo:border="0.05pt solid #dddddd"/>
    </style:style>
    <style:style style:name="Table2.C5" style:family="table-cell">
      <style:table-cell-properties style:vertical-align="middle" fo:padding-left="0.318cm" fo:padding-right="0.318cm" fo:padding-top="0.159cm" fo:padding-bottom="0.159cm" fo:border="0.05pt solid #dddddd"/>
    </style:style>
    <style:style style:name="Table3" style:family="table">
      <style:table-properties style:width="17.59cm" table:align="left"/>
    </style:style>
    <style:style style:name="Table3.A" style:family="table-column">
      <style:table-column-properties style:column-width="3.903cm"/>
    </style:style>
    <style:style style:name="Table3.B" style:family="table-column">
      <style:table-column-properties style:column-width="5.075cm"/>
    </style:style>
    <style:style style:name="Table3.C" style:family="table-column">
      <style:table-column-properties style:column-width="4.071cm"/>
    </style:style>
    <style:style style:name="Table3.D" style:family="table-column">
      <style:table-column-properties style:column-width="4.54cm"/>
    </style:style>
    <style:style style:name="Table3.A1" style:family="table-cell">
      <style:table-cell-properties style:vertical-align="middle" fo:background-color="#f2f2f2" fo:padding-left="0.318cm" fo:padding-right="0.318cm" fo:padding-top="0.159cm" fo:padding-bottom="0.159cm" fo:border="0.05pt solid #dddddd">
        <style:background-image/>
      </style:table-cell-properties>
    </style:style>
    <style:style style:name="Table3.A2" style:family="table-cell">
      <style:table-cell-properties style:vertical-align="middle" fo:padding-left="0.318cm" fo:padding-right="0.318cm" fo:padding-top="0.159cm" fo:padding-bottom="0.159cm" fo:border="0.05pt solid #dddddd"/>
    </style:style>
    <style:style style:name="Table3.B2" style:family="table-cell">
      <style:table-cell-properties style:vertical-align="middle" fo:padding-left="0.318cm" fo:padding-right="0.318cm" fo:padding-top="0.159cm" fo:padding-bottom="0.159cm" fo:border="0.05pt solid #dddddd"/>
    </style:style>
    <style:style style:name="Table3.C2" style:family="table-cell">
      <style:table-cell-properties style:vertical-align="middle" fo:padding-left="0.318cm" fo:padding-right="0.318cm" fo:padding-top="0.159cm" fo:padding-bottom="0.159cm" fo:border="0.05pt solid #dddddd"/>
    </style:style>
    <style:style style:name="Table3.D2" style:family="table-cell">
      <style:table-cell-properties style:vertical-align="middle" fo:padding-left="0.318cm" fo:padding-right="0.318cm" fo:padding-top="0.159cm" fo:padding-bottom="0.159cm" fo:border="0.05pt solid #dddddd"/>
    </style:style>
    <style:style style:name="Table3.A3" style:family="table-cell">
      <style:table-cell-properties style:vertical-align="middle" fo:padding-left="0.318cm" fo:padding-right="0.318cm" fo:padding-top="0.159cm" fo:padding-bottom="0.159cm" fo:border="0.05pt solid #dddddd"/>
    </style:style>
    <style:style style:name="Table3.B3" style:family="table-cell">
      <style:table-cell-properties style:vertical-align="middle" fo:padding-left="0.318cm" fo:padding-right="0.318cm" fo:padding-top="0.159cm" fo:padding-bottom="0.159cm" fo:border="0.05pt solid #dddddd"/>
    </style:style>
    <style:style style:name="Table3.C3" style:family="table-cell">
      <style:table-cell-properties style:vertical-align="middle" fo:padding-left="0.318cm" fo:padding-right="0.318cm" fo:padding-top="0.159cm" fo:padding-bottom="0.159cm" fo:border="0.05pt solid #dddddd"/>
    </style:style>
    <style:style style:name="Table3.D3" style:family="table-cell">
      <style:table-cell-properties style:vertical-align="middle" fo:padding-left="0.318cm" fo:padding-right="0.318cm" fo:padding-top="0.159cm" fo:padding-bottom="0.159cm" fo:border="0.05pt solid #dddddd"/>
    </style:style>
    <style:style style:name="Table3.A4" style:family="table-cell">
      <style:table-cell-properties style:vertical-align="middle" fo:padding-left="0.318cm" fo:padding-right="0.318cm" fo:padding-top="0.159cm" fo:padding-bottom="0.159cm" fo:border="0.05pt solid #dddddd"/>
    </style:style>
    <style:style style:name="Table3.B4" style:family="table-cell">
      <style:table-cell-properties style:vertical-align="middle" fo:padding-left="0.318cm" fo:padding-right="0.318cm" fo:padding-top="0.159cm" fo:padding-bottom="0.159cm" fo:border="0.05pt solid #dddddd"/>
    </style:style>
    <style:style style:name="Table3.C4" style:family="table-cell">
      <style:table-cell-properties style:vertical-align="middle" fo:padding-left="0.318cm" fo:padding-right="0.318cm" fo:padding-top="0.159cm" fo:padding-bottom="0.159cm" fo:border="0.05pt solid #dddddd"/>
    </style:style>
    <style:style style:name="Table3.D4" style:family="table-cell">
      <style:table-cell-properties style:vertical-align="middle" fo:padding-left="0.318cm" fo:padding-right="0.318cm" fo:padding-top="0.159cm" fo:padding-bottom="0.159cm" fo:border="0.05pt solid #dddddd"/>
    </style:style>
    <style:style style:name="Table3.A5" style:family="table-cell">
      <style:table-cell-properties style:vertical-align="middle" fo:padding-left="0.318cm" fo:padding-right="0.318cm" fo:padding-top="0.159cm" fo:padding-bottom="0.159cm" fo:border="0.05pt solid #dddddd"/>
    </style:style>
    <style:style style:name="Table3.B5" style:family="table-cell">
      <style:table-cell-properties style:vertical-align="middle" fo:padding-left="0.318cm" fo:padding-right="0.318cm" fo:padding-top="0.159cm" fo:padding-bottom="0.159cm" fo:border="0.05pt solid #dddddd"/>
    </style:style>
    <style:style style:name="Table3.C5" style:family="table-cell">
      <style:table-cell-properties style:vertical-align="middle" fo:padding-left="0.318cm" fo:padding-right="0.318cm" fo:padding-top="0.159cm" fo:padding-bottom="0.159cm" fo:border="0.05pt solid #dddddd"/>
    </style:style>
    <style:style style:name="Table3.D5" style:family="table-cell">
      <style:table-cell-properties style:vertical-align="middle" fo:padding-left="0.318cm" fo:padding-right="0.318cm" fo:padding-top="0.159cm" fo:padding-bottom="0.159cm" fo:border="0.05pt solid #dddddd"/>
    </style:style>
    <style:style style:name="Table3.A6" style:family="table-cell">
      <style:table-cell-properties style:vertical-align="middle" fo:padding-left="0.318cm" fo:padding-right="0.318cm" fo:padding-top="0.159cm" fo:padding-bottom="0.159cm" fo:border="0.05pt solid #dddddd"/>
    </style:style>
    <style:style style:name="Table3.B6" style:family="table-cell">
      <style:table-cell-properties style:vertical-align="middle" fo:padding-left="0.318cm" fo:padding-right="0.318cm" fo:padding-top="0.159cm" fo:padding-bottom="0.159cm" fo:border="0.05pt solid #dddddd"/>
    </style:style>
    <style:style style:name="Table3.C6" style:family="table-cell">
      <style:table-cell-properties style:vertical-align="middle" fo:padding-left="0.318cm" fo:padding-right="0.318cm" fo:padding-top="0.159cm" fo:padding-bottom="0.159cm" fo:border="0.05pt solid #dddddd"/>
    </style:style>
    <style:style style:name="Table3.D6" style:family="table-cell">
      <style:table-cell-properties style:vertical-align="middle" fo:padding-left="0.318cm" fo:padding-right="0.318cm" fo:padding-top="0.159cm" fo:padding-bottom="0.159cm" fo:border="0.05pt solid #dddddd"/>
    </style:style>
    <style:style style:name="Table4" style:family="table">
      <style:table-properties style:width="15.607cm" table:align="left"/>
    </style:style>
    <style:style style:name="Table4.A" style:family="table-column">
      <style:table-column-properties style:column-width="3.845cm"/>
    </style:style>
    <style:style style:name="Table4.B" style:family="table-column">
      <style:table-column-properties style:column-width="4.406cm"/>
    </style:style>
    <style:style style:name="Table4.C" style:family="table-column">
      <style:table-column-properties style:column-width="7.355cm"/>
    </style:style>
    <style:style style:name="Table4.A1" style:family="table-cell">
      <style:table-cell-properties style:vertical-align="middle" fo:background-color="#f2f2f2" fo:padding-left="0.318cm" fo:padding-right="0.318cm" fo:padding-top="0.159cm" fo:padding-bottom="0.159cm" fo:border="0.05pt solid #dddddd">
        <style:background-image/>
      </style:table-cell-properties>
    </style:style>
    <style:style style:name="Table4.A2" style:family="table-cell">
      <style:table-cell-properties style:vertical-align="middle" fo:padding-left="0.318cm" fo:padding-right="0.318cm" fo:padding-top="0.159cm" fo:padding-bottom="0.159cm" fo:border="0.05pt solid #dddddd"/>
    </style:style>
    <style:style style:name="Table4.B2" style:family="table-cell">
      <style:table-cell-properties style:vertical-align="middle" fo:padding-left="0.318cm" fo:padding-right="0.318cm" fo:padding-top="0.159cm" fo:padding-bottom="0.159cm" fo:border="0.05pt solid #dddddd"/>
    </style:style>
    <style:style style:name="Table4.C2" style:family="table-cell">
      <style:table-cell-properties style:vertical-align="middle" fo:padding-left="0.318cm" fo:padding-right="0.318cm" fo:padding-top="0.159cm" fo:padding-bottom="0.159cm" fo:border="0.05pt solid #dddddd"/>
    </style:style>
    <style:style style:name="Table4.A3" style:family="table-cell">
      <style:table-cell-properties style:vertical-align="middle" fo:padding-left="0.318cm" fo:padding-right="0.318cm" fo:padding-top="0.159cm" fo:padding-bottom="0.159cm" fo:border="0.05pt solid #dddddd"/>
    </style:style>
    <style:style style:name="Table4.B3" style:family="table-cell">
      <style:table-cell-properties style:vertical-align="middle" fo:padding-left="0.318cm" fo:padding-right="0.318cm" fo:padding-top="0.159cm" fo:padding-bottom="0.159cm" fo:border="0.05pt solid #dddddd"/>
    </style:style>
    <style:style style:name="Table4.C3" style:family="table-cell">
      <style:table-cell-properties style:vertical-align="middle" fo:padding-left="0.318cm" fo:padding-right="0.318cm" fo:padding-top="0.159cm" fo:padding-bottom="0.159cm" fo:border="0.05pt solid #dddddd"/>
    </style:style>
    <style:style style:name="Table4.A4" style:family="table-cell">
      <style:table-cell-properties style:vertical-align="middle" fo:padding-left="0.318cm" fo:padding-right="0.318cm" fo:padding-top="0.159cm" fo:padding-bottom="0.159cm" fo:border="0.05pt solid #dddddd"/>
    </style:style>
    <style:style style:name="Table4.B4" style:family="table-cell">
      <style:table-cell-properties style:vertical-align="middle" fo:padding-left="0.318cm" fo:padding-right="0.318cm" fo:padding-top="0.159cm" fo:padding-bottom="0.159cm" fo:border="0.05pt solid #dddddd"/>
    </style:style>
    <style:style style:name="Table4.C4" style:family="table-cell">
      <style:table-cell-properties style:vertical-align="middle" fo:padding-left="0.318cm" fo:padding-right="0.318cm" fo:padding-top="0.159cm" fo:padding-bottom="0.159cm" fo:border="0.05pt solid #dddddd"/>
    </style:style>
    <style:style style:name="Table4.A5" style:family="table-cell">
      <style:table-cell-properties style:vertical-align="middle" fo:padding-left="0.318cm" fo:padding-right="0.318cm" fo:padding-top="0.159cm" fo:padding-bottom="0.159cm" fo:border="0.05pt solid #dddddd"/>
    </style:style>
    <style:style style:name="Table4.B5" style:family="table-cell">
      <style:table-cell-properties style:vertical-align="middle" fo:padding-left="0.318cm" fo:padding-right="0.318cm" fo:padding-top="0.159cm" fo:padding-bottom="0.159cm" fo:border="0.05pt solid #dddddd"/>
    </style:style>
    <style:style style:name="Table4.C5" style:family="table-cell">
      <style:table-cell-properties style:vertical-align="middle" fo:padding-left="0.318cm" fo:padding-right="0.318cm" fo:padding-top="0.159cm" fo:padding-bottom="0.159cm" fo:border="0.05pt solid #dddddd"/>
    </style:style>
    <style:style style:name="Table4.A6" style:family="table-cell">
      <style:table-cell-properties style:vertical-align="middle" fo:padding-left="0.318cm" fo:padding-right="0.318cm" fo:padding-top="0.159cm" fo:padding-bottom="0.159cm" fo:border="0.05pt solid #dddddd"/>
    </style:style>
    <style:style style:name="Table4.B6" style:family="table-cell">
      <style:table-cell-properties style:vertical-align="middle" fo:padding-left="0.318cm" fo:padding-right="0.318cm" fo:padding-top="0.159cm" fo:padding-bottom="0.159cm" fo:border="0.05pt solid #dddddd"/>
    </style:style>
    <style:style style:name="Table4.C6" style:family="table-cell">
      <style:table-cell-properties style:vertical-align="middle" fo:padding-left="0.318cm" fo:padding-right="0.318cm" fo:padding-top="0.159cm" fo:padding-bottom="0.159cm" fo:border="0.05pt solid #dddddd"/>
    </style:style>
    <style:style style:name="Table5" style:family="table">
      <style:table-properties style:width="17.59cm" table:align="left"/>
    </style:style>
    <style:style style:name="Table5.A" style:family="table-column">
      <style:table-column-properties style:column-width="3.851cm"/>
    </style:style>
    <style:style style:name="Table5.B" style:family="table-column">
      <style:table-column-properties style:column-width="2.838cm"/>
    </style:style>
    <style:style style:name="Table5.C" style:family="table-column">
      <style:table-column-properties style:column-width="10.901cm"/>
    </style:style>
    <style:style style:name="Table5.A1" style:family="table-cell">
      <style:table-cell-properties style:vertical-align="middle" fo:background-color="#f2f2f2" fo:padding-left="0.318cm" fo:padding-right="0.318cm" fo:padding-top="0.159cm" fo:padding-bottom="0.159cm" fo:border="0.05pt solid #dddddd">
        <style:background-image/>
      </style:table-cell-properties>
    </style:style>
    <style:style style:name="Table5.A2" style:family="table-cell">
      <style:table-cell-properties style:vertical-align="middle" fo:padding-left="0.318cm" fo:padding-right="0.318cm" fo:padding-top="0.159cm" fo:padding-bottom="0.159cm" fo:border="0.05pt solid #dddddd"/>
    </style:style>
    <style:style style:name="Table5.B2" style:family="table-cell">
      <style:table-cell-properties style:vertical-align="middle" fo:padding-left="0.318cm" fo:padding-right="0.318cm" fo:padding-top="0.159cm" fo:padding-bottom="0.159cm" fo:border="0.05pt solid #dddddd"/>
    </style:style>
    <style:style style:name="Table5.C2" style:family="table-cell">
      <style:table-cell-properties style:vertical-align="middle" fo:padding-left="0.318cm" fo:padding-right="0.318cm" fo:padding-top="0.159cm" fo:padding-bottom="0.159cm" fo:border="0.05pt solid #dddddd"/>
    </style:style>
    <style:style style:name="Table5.A3" style:family="table-cell">
      <style:table-cell-properties style:vertical-align="middle" fo:padding-left="0.318cm" fo:padding-right="0.318cm" fo:padding-top="0.159cm" fo:padding-bottom="0.159cm" fo:border="0.05pt solid #dddddd"/>
    </style:style>
    <style:style style:name="Table5.B3" style:family="table-cell">
      <style:table-cell-properties style:vertical-align="middle" fo:padding-left="0.318cm" fo:padding-right="0.318cm" fo:padding-top="0.159cm" fo:padding-bottom="0.159cm" fo:border="0.05pt solid #dddddd"/>
    </style:style>
    <style:style style:name="Table5.C3" style:family="table-cell">
      <style:table-cell-properties style:vertical-align="middle" fo:padding-left="0.318cm" fo:padding-right="0.318cm" fo:padding-top="0.159cm" fo:padding-bottom="0.159cm" fo:border="0.05pt solid #dddddd"/>
    </style:style>
    <style:style style:name="Table5.A4" style:family="table-cell">
      <style:table-cell-properties style:vertical-align="middle" fo:padding-left="0.318cm" fo:padding-right="0.318cm" fo:padding-top="0.159cm" fo:padding-bottom="0.159cm" fo:border="0.05pt solid #dddddd"/>
    </style:style>
    <style:style style:name="Table5.B4" style:family="table-cell">
      <style:table-cell-properties style:vertical-align="middle" fo:padding-left="0.318cm" fo:padding-right="0.318cm" fo:padding-top="0.159cm" fo:padding-bottom="0.159cm" fo:border="0.05pt solid #dddddd"/>
    </style:style>
    <style:style style:name="Table5.C4" style:family="table-cell">
      <style:table-cell-properties style:vertical-align="middle" fo:padding-left="0.318cm" fo:padding-right="0.318cm" fo:padding-top="0.159cm" fo:padding-bottom="0.159cm" fo:border="0.05pt solid #dddddd"/>
    </style:style>
    <style:style style:name="Table5.A5" style:family="table-cell">
      <style:table-cell-properties style:vertical-align="middle" fo:padding-left="0.318cm" fo:padding-right="0.318cm" fo:padding-top="0.159cm" fo:padding-bottom="0.159cm" fo:border="0.05pt solid #dddddd"/>
    </style:style>
    <style:style style:name="Table5.B5" style:family="table-cell">
      <style:table-cell-properties style:vertical-align="middle" fo:padding-left="0.318cm" fo:padding-right="0.318cm" fo:padding-top="0.159cm" fo:padding-bottom="0.159cm" fo:border="0.05pt solid #dddddd"/>
    </style:style>
    <style:style style:name="Table5.C5" style:family="table-cell">
      <style:table-cell-properties style:vertical-align="middle" fo:padding-left="0.318cm" fo:padding-right="0.318cm" fo:padding-top="0.159cm" fo:padding-bottom="0.159cm" fo:border="0.05pt solid #dddddd"/>
    </style:style>
    <style:style style:name="P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222222" loext:opacity="100%" fo:letter-spacing="normal"/>
    </style:style>
    <style:style style:name="P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222222" loext:opacity="100%" fo:letter-spacing="normal" fo:background-color="#f4f4f4" loext:padding-left="0cm" loext:padding-right="0cm" loext:padding-top="0cm" loext:padding-bottom="0.212cm" loext:border-left="none" loext:border-right="none" loext:border-top="none" loext:border-bottom="0.06pt solid #dddddd"/>
    </style:style>
    <style:style style:name="P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Noto Sans" fo:font-size="10.5pt" fo:letter-spacing="normal" fo:font-style="normal" fo:font-weight="normal" fo:background-color="#f4f4f4" loext:padding-left="0cm" loext:padding-right="0cm" loext:padding-top="0cm" loext:padding-bottom="0.212cm" loext:border-left="none" loext:border-right="none" loext:border-top="none" loext:border-bottom="0.06pt solid #dddddd"/>
    </style:style>
    <style:style style:name="P4" style:family="paragraph" style:parent-style-name="Heading_20_1">
      <style:paragraph-properties fo:margin-left="0cm" fo:margin-right="0cm" fo:margin-top="0cm" fo:margin-bottom="0.212cm" style:contextual-spacing="false" fo:orphans="2" fo:widows="2" fo:text-indent="0cm" style:auto-text-indent="false"/>
      <style:text-properties fo:font-size="18pt" fo:font-weight="bold" loext:padding="0cm" loext:border="none"/>
    </style:style>
    <style:style style:name="P5" style:family="paragraph" style:parent-style-name="Heading_20_2">
      <style:paragraph-properties fo:margin-left="0cm" fo:margin-right="0cm" fo:margin-top="0.847cm" fo:margin-bottom="0.212cm" style:contextual-spacing="false" fo:orphans="2" fo:widows="2" fo:text-indent="0cm" style:auto-text-indent="false"/>
      <style:text-properties fo:font-variant="normal" fo:text-transform="none" fo:color="#222222" loext:opacity="100%" style:font-name="Noto Sans" fo:font-size="15pt" fo:letter-spacing="normal" fo:font-style="normal" fo:font-weight="bold" fo:background-color="#f4f4f4" loext:padding="0cm" loext:border="none"/>
    </style:style>
    <style:style style:name="P6" style:family="paragraph" style:parent-style-name="Text_20_body">
      <style:paragraph-properties fo:margin-left="0cm" fo:margin-right="0cm" fo:margin-top="0cm" fo:margin-bottom="0cm" style:contextual-spacing="false" fo:line-height="140%" fo:text-align="center" style:justify-single-word="false" fo:orphans="2" fo:widows="2" fo:text-indent="0cm" style:auto-text-indent="false"/>
    </style:style>
    <style:style style:name="P7" style:family="paragraph" style:parent-style-name="Horizontal_20_Line">
      <style:paragraph-properties fo:margin-left="0cm" fo:margin-right="0cm" fo:margin-top="0cm" fo:margin-bottom="0cm" style:contextual-spacing="false" fo:orphans="2" fo:widows="2" fo:text-indent="0cm" style:auto-text-indent="false"/>
    </style:style>
    <style:style style:name="P8" style:family="paragraph" style:parent-style-name="Text_20_body" style:list-style-name="L1">
      <style:paragraph-properties fo:margin-left="0cm" fo:margin-right="0cm" fo:margin-top="0cm" fo:margin-bottom="0cm" style:contextual-spacing="false" fo:line-height="140%" fo:text-align="center" style:justify-single-word="false" fo:orphans="2" fo:widows="2" fo:text-indent="0cm" style:auto-text-indent="false" fo:padding="0cm" fo:border="none"/>
    </style:style>
    <style:style style:name="P9" style:family="paragraph" style:parent-style-name="Heading_20_3">
      <style:paragraph-properties fo:margin-left="0cm" fo:margin-right="0cm" fo:margin-top="0.847cm" fo:margin-bottom="0.212cm" style:contextual-spacing="false" fo:orphans="2" fo:widows="2" fo:text-indent="0cm" style:auto-text-indent="false"/>
      <style:text-properties fo:font-variant="normal" fo:text-transform="none" fo:color="#222222" loext:opacity="100%" style:font-name="Noto Sans" fo:font-size="13.5pt" fo:letter-spacing="normal" fo:font-style="normal" fo:font-weight="bold" fo:background-color="#f4f4f4" loext:padding="0cm" loext:border="none"/>
    </style:style>
    <style:style style:name="P10" style:family="paragraph" style:parent-style-name="Text_20_body">
      <style:paragraph-properties fo:margin-left="0cm" fo:margin-right="0cm" fo:margin-top="0cm" fo:margin-bottom="0cm" style:contextual-spacing="false" fo:line-height="175%" fo:orphans="2" fo:widows="2" fo:text-indent="0cm" style:auto-text-indent="false"/>
    </style:style>
    <style:style style:name="P11" style:family="paragraph" style:parent-style-name="Text_20_body" style:list-style-name="L2">
      <style:paragraph-properties fo:margin-left="0cm" fo:margin-right="0cm" fo:margin-top="0cm" fo:margin-bottom="0cm" style:contextual-spacing="false" fo:line-height="175%" fo:orphans="2" fo:widows="2" fo:text-indent="0cm" style:auto-text-indent="false" fo:padding="0cm" fo:border="none"/>
    </style:style>
    <style:style style:name="P12" style:family="paragraph" style:parent-style-name="Text_20_body">
      <style:paragraph-properties fo:margin-left="0cm" fo:margin-right="0cm" fo:margin-top="0.212cm" fo:margin-bottom="0cm" style:contextual-spacing="false" fo:line-height="175%" fo:orphans="2" fo:widows="2" fo:text-indent="0cm" style:auto-text-indent="false"/>
      <style:text-properties fo:font-variant="normal" fo:text-transform="none" fo:color="#222222" loext:opacity="100%" style:font-name="Noto Sans" fo:font-size="10.5pt" fo:letter-spacing="normal" fo:font-style="normal" fo:font-weight="normal" fo:background-color="#f4f4f4" loext:padding="0cm" loext:border="none"/>
    </style:style>
    <style:style style:name="P1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fo:letter-spacing="normal" fo:background-color="#f4f4f4" loext:padding="0cm" loext:border="none"/>
    </style:style>
    <style:style style:name="P14" style:family="paragraph" style:parent-style-name="Table_20_Heading">
      <style:paragraph-properties fo:margin-left="0cm" fo:margin-right="0cm" fo:margin-top="0cm" fo:margin-bottom="0cm" style:contextual-spacing="false" fo:text-align="start" style:justify-single-word="false" fo:text-indent="0cm" style:auto-text-indent="false"/>
    </style:style>
    <style:style style:name="P15"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16" style:family="paragraph" style:parent-style-name="Table_20_Contents">
      <style:paragraph-properties fo:margin-left="0cm" fo:margin-right="0cm" fo:margin-top="0cm" fo:margin-bottom="0cm" style:contextual-spacing="false" fo:text-align="start" style:justify-single-word="false"/>
    </style:style>
    <style:style style:name="P17" style:family="paragraph" style:parent-style-name="Text_20_body" style:list-style-name="L3">
      <style:paragraph-properties fo:margin-left="0cm" fo:margin-right="0cm" fo:margin-top="0cm" fo:margin-bottom="0cm" style:contextual-spacing="false" fo:line-height="175%" fo:orphans="2" fo:widows="2" fo:text-indent="0cm" style:auto-text-indent="false" fo:padding="0cm" fo:border="none"/>
    </style:style>
    <style:style style:name="P1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Noto Sans" fo:font-size="10.5pt" fo:letter-spacing="normal" fo:font-style="normal" fo:font-weight="normal" fo:background-color="#f4f4f4" loext:padding="0cm" loext:border="none"/>
    </style:style>
    <style:style style:name="P19" style:family="paragraph" style:parent-style-name="Text_20_body">
      <style:paragraph-properties fo:margin-left="0cm" fo:margin-right="0cm" fo:margin-top="0cm" fo:margin-bottom="0.212cm" style:contextual-spacing="false" fo:line-height="175%" fo:orphans="2" fo:widows="2" fo:text-indent="0cm" style:auto-text-indent="false"/>
      <style:text-properties fo:font-variant="normal" fo:text-transform="none" fo:color="#222222" loext:opacity="100%" style:font-name="Noto Sans" fo:font-size="10.5pt" fo:letter-spacing="normal" fo:font-style="normal" fo:font-weight="normal" style:font-name-asian="Noto Sans" style:font-size-asian="10.5pt" style:font-style-asian="normal" style:font-weight-asian="normal" style:font-name-complex="Noto Sans" style:font-size-complex="10.5pt" style:font-style-complex="normal" style:font-weight-complex="normal"/>
    </style:style>
    <style:style style:name="P20" style:family="paragraph" style:parent-style-name="Text_20_body" style:list-style-name="L4">
      <style:paragraph-properties fo:margin-left="0cm" fo:margin-right="0cm" fo:margin-top="0cm" fo:margin-bottom="0cm" style:contextual-spacing="false" fo:line-height="175%" fo:orphans="2" fo:widows="2" fo:text-indent="0cm" style:auto-text-indent="false" fo:padding="0cm" fo:border="none"/>
      <style:text-properties fo:font-variant="normal" fo:text-transform="none" fo:color="#222222" loext:opacity="100%" style:font-name="Noto Sans" fo:font-size="10.5pt" fo:letter-spacing="normal" fo:font-style="normal" fo:font-weight="normal"/>
    </style:style>
    <style:style style:name="P2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Noto Sans" fo:font-size="10.5pt" fo:letter-spacing="normal" fo:font-style="normal" fo:font-weight="normal"/>
    </style:style>
    <style:style style:name="P2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Noto Sans" fo:font-size="12pt" fo:letter-spacing="normal" fo:font-style="normal" fo:font-weight="normal" loext:padding="0cm" loext:border="none"/>
    </style:style>
    <style:style style:name="P23" style:family="paragraph" style:parent-style-name="Text_20_body">
      <style:paragraph-properties fo:margin-left="0.212cm" fo:margin-right="0.106cm" fo:margin-top="0cm" fo:margin-bottom="0cm" style:contextual-spacing="false" style:line-height-at-least="0.635cm" fo:orphans="2" fo:widows="2" fo:text-indent="0cm" style:auto-text-indent="false"/>
      <style:text-properties fo:font-variant="normal" fo:text-transform="none" fo:color="#767676" loext:opacity="100%" style:font-name="Noto Sans" fo:font-size="12pt" fo:letter-spacing="normal" fo:font-style="normal" fo:font-weight="normal"/>
    </style:style>
    <style:style style:name="P24" style:family="paragraph" style:parent-style-name="Text_20_body" style:list-style-name="L5">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049cm" fo:border="0.06pt solid #ffffff"/>
      <style:text-properties fo:font-variant="normal" fo:text-transform="none" fo:color="#222222" loext:opacity="100%" fo:letter-spacing="normal"/>
    </style:style>
    <style:style style:name="P25" style:family="paragraph" style:parent-style-name="Text_20_body">
      <style:paragraph-properties fo:margin-left="0.159cm" fo:margin-right="0cm" fo:margin-top="0cm" fo:margin-bottom="0cm" style:contextual-spacing="false" style:line-height-at-least="0.423cm" fo:orphans="2" fo:widows="2" fo:text-indent="0cm" style:auto-text-indent="false"/>
      <style:text-properties fo:font-variant="normal" fo:text-transform="none" fo:color="#222222" loext:opacity="100%" style:font-name="Noto Sans" fo:font-size="9pt" fo:letter-spacing="normal" fo:font-style="normal" fo:font-weight="normal"/>
    </style:style>
    <style:style style:name="P2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fo:letter-spacing="normal"/>
    </style:style>
    <style:style style:name="P2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fo:letter-spacing="normal" fo:background-color="#f4f4f4" loext:padding-left="0cm" loext:padding-right="0cm" loext:padding-top="0cm" loext:padding-bottom="0.212cm" loext:border-left="none" loext:border-right="none" loext:border-top="none" loext:border-bottom="0.06pt solid #dddddd"/>
    </style:style>
    <style:style style:name="P2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Noto Sans" fo:font-size="10.5pt" fo:letter-spacing="normal" fo:font-style="normal" fo:font-weight="normal" fo:background-color="#f4f4f4" loext:padding-left="0cm" loext:padding-right="0cm" loext:padding-top="0cm" loext:padding-bottom="0.212cm" loext:border-left="none" loext:border-right="none" loext:border-top="none" loext:border-bottom="0.06pt solid #dddddd"/>
    </style:style>
    <style:style style:name="P29" style:family="paragraph" style:parent-style-name="Text_20_body">
      <style:paragraph-properties fo:margin-left="0cm" fo:margin-right="0cm" fo:margin-top="0.212cm" fo:margin-bottom="0.212cm" style:contextual-spacing="false" fo:line-height="175%" fo:orphans="2" fo:widows="2" fo:text-indent="0cm" style:auto-text-indent="false"/>
      <style:text-properties fo:font-variant="normal" fo:text-transform="none" fo:color="#222222" loext:opacity="100%" style:font-name="Noto Sans" fo:font-size="10.5pt" fo:letter-spacing="normal" fo:font-style="normal" fo:font-weight="normal" fo:background-color="#f4f4f4" loext:padding="0cm" loext:border="none"/>
    </style:style>
    <style:style style:name="P30" style:family="paragraph" style:parent-style-name="Table_20_Contents">
      <style:paragraph-properties fo:margin-left="0cm" fo:margin-right="0cm" fo:margin-top="0cm" fo:margin-bottom="0cm" style:contextual-spacing="false" fo:line-height="140%" fo:text-align="center" style:justify-single-word="false" fo:text-indent="0cm" style:auto-text-indent="false"/>
    </style:style>
    <style:style style:name="P31" style:family="paragraph" style:parent-style-name="Text_20_body" style:list-style-name="L6">
      <style:paragraph-properties fo:margin-left="0cm" fo:margin-right="0cm" fo:margin-top="0cm" fo:margin-bottom="0cm" style:contextual-spacing="false" fo:line-height="140%" fo:text-align="center" style:justify-single-word="false" fo:orphans="2" fo:widows="2" fo:text-indent="0cm" style:auto-text-indent="false" fo:padding="0cm" fo:border="none"/>
    </style:style>
    <style:style style:name="P32" style:family="paragraph" style:parent-style-name="Text_20_body" style:list-style-name="L7">
      <style:paragraph-properties fo:margin-left="0cm" fo:margin-right="0cm" fo:margin-top="0cm" fo:margin-bottom="0cm" style:contextual-spacing="false" fo:line-height="175%" fo:orphans="2" fo:widows="2" fo:text-indent="0cm" style:auto-text-indent="false" fo:padding="0cm" fo:border="none"/>
    </style:style>
    <style:style style:name="P33" style:family="paragraph" style:parent-style-name="Text_20_body" style:list-style-name="L7">
      <style:paragraph-properties fo:margin-left="0cm" fo:margin-right="0cm" fo:margin-top="0cm" fo:margin-bottom="0cm" style:contextual-spacing="false" fo:line-height="140%" fo:text-align="center" style:justify-single-word="false" fo:orphans="2" fo:widows="2" fo:text-indent="0cm" style:auto-text-indent="false" fo:padding="0cm" fo:border="none"/>
    </style:style>
    <style:style style:name="P34" style:family="paragraph" style:parent-style-name="Text_20_body" style:list-style-name="L8">
      <style:paragraph-properties fo:margin-left="0cm" fo:margin-right="0cm" fo:margin-top="0cm" fo:margin-bottom="0cm" style:contextual-spacing="false" fo:line-height="175%" fo:orphans="2" fo:widows="2" fo:text-indent="0cm" style:auto-text-indent="false" fo:padding="0cm" fo:border="none"/>
      <style:text-properties fo:font-variant="normal" fo:text-transform="none" fo:color="#222222" loext:opacity="100%" style:font-name="Noto Sans" fo:font-size="10.5pt" fo:letter-spacing="normal" fo:font-style="normal" fo:font-weight="normal"/>
    </style:style>
    <style:style style:name="P35" style:family="paragraph" style:parent-style-name="Text_20_body" style:list-style-name="L9">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049cm" fo:border="0.06pt solid #ffffff"/>
      <style:text-properties fo:font-variant="normal" fo:text-transform="none" fo:color="#222222" loext:opacity="100%" fo:letter-spacing="normal"/>
    </style:style>
    <style:style style:name="P36" style:family="paragraph" style:parent-style-name="Text_20_body">
      <style:paragraph-properties fo:margin-left="0cm" fo:margin-right="0cm" fo:margin-top="0.212cm" fo:margin-bottom="0cm" style:contextual-spacing="false" fo:line-height="175%" fo:orphans="2" fo:widows="2" fo:text-indent="0cm" style:auto-text-indent="false"/>
      <style:text-properties fo:font-variant="normal" fo:text-transform="none" fo:color="#222222" loext:opacity="100%" style:font-name="Noto Sans" fo:font-size="10.5pt" fo:letter-spacing="normal" fo:font-style="normal" fo:font-weight="normal"/>
    </style:style>
    <style:style style:name="P37" style:family="paragraph" style:parent-style-name="Text_20_body">
      <style:paragraph-properties fo:margin-left="0cm" fo:margin-right="0cm" fo:margin-top="0.212cm" fo:margin-bottom="0cm" style:contextual-spacing="false" fo:line-height="175%" fo:orphans="2" fo:widows="2" fo:text-indent="0cm" style:auto-text-indent="false"/>
    </style:style>
    <style:style style:name="P38" style:family="paragraph" style:parent-style-name="Text_20_body" style:list-style-name="L10">
      <style:paragraph-properties fo:margin-left="0cm" fo:margin-right="0cm" fo:margin-top="0cm" fo:margin-bottom="0cm" style:contextual-spacing="false" fo:line-height="140%" fo:text-align="center" style:justify-single-word="false" fo:orphans="2" fo:widows="2" fo:text-indent="0cm" style:auto-text-indent="false" fo:padding="0cm" fo:border="none"/>
    </style:style>
    <style:style style:name="P39" style:family="paragraph" style:parent-style-name="Text_20_body" style:list-style-name="L11">
      <style:paragraph-properties fo:margin-left="0cm" fo:margin-right="0cm" fo:margin-top="0cm" fo:margin-bottom="0cm" style:contextual-spacing="false" fo:line-height="140%" fo:text-align="center" style:justify-single-word="false" fo:orphans="2" fo:widows="2" fo:text-indent="0cm" style:auto-text-indent="false" fo:padding="0cm" fo:border="none"/>
    </style:style>
    <style:style style:name="P40" style:family="paragraph" style:parent-style-name="Text_20_body" style:list-style-name="L11">
      <style:paragraph-properties fo:margin-left="0cm" fo:margin-right="0cm" fo:margin-top="0cm" fo:margin-bottom="0cm" style:contextual-spacing="false" fo:line-height="175%" fo:orphans="2" fo:widows="2" fo:text-indent="0cm" style:auto-text-indent="false" fo:padding="0cm" fo:border="none"/>
    </style:style>
    <style:style style:name="P41" style:family="paragraph" style:parent-style-name="Text_20_body" style:list-style-name="L12">
      <style:paragraph-properties fo:margin-left="0cm" fo:margin-right="0cm" fo:margin-top="0cm" fo:margin-bottom="0cm" style:contextual-spacing="false" fo:line-height="175%" fo:orphans="2" fo:widows="2" fo:text-indent="0cm" style:auto-text-indent="false" fo:padding="0cm" fo:border="none"/>
      <style:text-properties fo:font-variant="normal" fo:text-transform="none" fo:color="#222222" loext:opacity="100%" style:font-name="Noto Sans" fo:font-size="10.5pt" fo:letter-spacing="normal" fo:font-style="normal" fo:font-weight="normal"/>
    </style:style>
    <style:style style:name="P42" style:family="paragraph" style:parent-style-name="Text_20_body" style:list-style-name="L13">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049cm" fo:border="0.06pt solid #ffffff"/>
      <style:text-properties fo:font-variant="normal" fo:text-transform="none" fo:color="#222222" loext:opacity="100%" fo:letter-spacing="normal"/>
    </style:style>
    <style:style style:name="P43" style:family="paragraph" style:parent-style-name="Heading_20_3">
      <style:paragraph-properties fo:margin-left="0cm" fo:margin-right="0cm" fo:margin-top="0.847cm" fo:margin-bottom="0.212cm" style:contextual-spacing="false" fo:orphans="2" fo:widows="2" fo:text-indent="0cm" style:auto-text-indent="false"/>
      <style:text-properties fo:font-variant="normal" fo:text-transform="none" fo:color="#222222" loext:opacity="100%" style:font-name="Noto Sans" fo:font-size="13.5pt" fo:letter-spacing="normal" fo:font-style="normal" fo:font-weight="bold"/>
    </style:style>
    <style:style style:name="P44" style:family="paragraph" style:parent-style-name="Text_20_body" style:list-style-name="L14">
      <style:paragraph-properties fo:margin-left="0cm" fo:margin-right="0cm" fo:margin-top="0cm" fo:margin-bottom="0cm" style:contextual-spacing="false" fo:line-height="140%" fo:text-align="center" style:justify-single-word="false" fo:orphans="2" fo:widows="2" fo:text-indent="0cm" style:auto-text-indent="false" fo:padding="0cm" fo:border="none"/>
    </style:style>
    <style:style style:name="P45" style:family="paragraph" style:parent-style-name="Text_20_body" style:list-style-name="L15">
      <style:paragraph-properties fo:margin-left="0cm" fo:margin-right="0cm" fo:margin-top="0cm" fo:margin-bottom="0cm" style:contextual-spacing="false" fo:line-height="175%" fo:orphans="2" fo:widows="2" fo:text-indent="0cm" style:auto-text-indent="false" fo:padding="0cm" fo:border="none"/>
    </style:style>
    <style:style style:name="P46" style:family="paragraph" style:parent-style-name="Text_20_body" style:list-style-name="L15">
      <style:paragraph-properties fo:margin-left="0cm" fo:margin-right="0cm" fo:margin-top="0cm" fo:margin-bottom="0cm" style:contextual-spacing="false" fo:line-height="140%" fo:text-align="center" style:justify-single-word="false" fo:orphans="2" fo:widows="2" fo:text-indent="0cm" style:auto-text-indent="false" fo:padding="0cm" fo:border="none"/>
    </style:style>
    <style:style style:name="P47" style:family="paragraph" style:parent-style-name="Text_20_body" style:list-style-name="L16">
      <style:paragraph-properties fo:margin-left="0cm" fo:margin-right="0cm" fo:margin-top="0cm" fo:margin-bottom="0cm" style:contextual-spacing="false" fo:line-height="175%" fo:orphans="2" fo:widows="2" fo:text-indent="0cm" style:auto-text-indent="false" fo:padding="0cm" fo:border="none"/>
    </style:style>
    <style:style style:name="P48" style:family="paragraph" style:parent-style-name="Text_20_body" style:list-style-name="L16">
      <style:paragraph-properties fo:margin-left="0cm" fo:margin-right="0cm" fo:margin-top="0cm" fo:margin-bottom="0cm" style:contextual-spacing="false" fo:line-height="140%" fo:text-align="center" style:justify-single-word="false" fo:orphans="2" fo:widows="2" fo:text-indent="0cm" style:auto-text-indent="false" fo:padding="0cm" fo:border="none"/>
    </style:style>
    <style:style style:name="P49" style:family="paragraph" style:parent-style-name="Text_20_body" style:list-style-name="L17">
      <style:paragraph-properties fo:margin-left="0cm" fo:margin-right="0cm" fo:margin-top="0cm" fo:margin-bottom="0cm" style:contextual-spacing="false" fo:line-height="175%" fo:orphans="2" fo:widows="2" fo:text-indent="0cm" style:auto-text-indent="false" fo:padding="0cm" fo:border="none"/>
    </style:style>
    <style:style style:name="P50" style:family="paragraph" style:parent-style-name="Text_20_body" style:list-style-name="L17">
      <style:paragraph-properties fo:margin-left="0cm" fo:margin-right="0cm" fo:margin-top="0cm" fo:margin-bottom="0cm" style:contextual-spacing="false" fo:line-height="140%" fo:text-align="center" style:justify-single-word="false" fo:orphans="2" fo:widows="2" fo:text-indent="0cm" style:auto-text-indent="false" fo:padding="0cm" fo:border="none"/>
    </style:style>
    <style:style style:name="P51" style:family="paragraph" style:parent-style-name="Text_20_body" style:list-style-name="L18">
      <style:paragraph-properties fo:margin-left="0cm" fo:margin-right="0cm" fo:margin-top="0cm" fo:margin-bottom="0cm" style:contextual-spacing="false" fo:line-height="175%" fo:orphans="2" fo:widows="2" fo:text-indent="0cm" style:auto-text-indent="false" fo:padding="0cm" fo:border="none"/>
    </style:style>
    <style:style style:name="P52" style:family="paragraph" style:parent-style-name="Text_20_body" style:list-style-name="L18">
      <style:paragraph-properties fo:margin-left="0cm" fo:margin-right="0cm" fo:margin-top="0cm" fo:margin-bottom="0cm" style:contextual-spacing="false" fo:line-height="140%" fo:text-align="center" style:justify-single-word="false" fo:orphans="2" fo:widows="2" fo:text-indent="0cm" style:auto-text-indent="false" fo:padding="0cm" fo:border="none"/>
    </style:style>
    <style:style style:name="P53" style:family="paragraph" style:parent-style-name="Text_20_body" style:list-style-name="L19">
      <style:paragraph-properties fo:margin-left="0cm" fo:margin-right="0cm" fo:margin-top="0cm" fo:margin-bottom="0cm" style:contextual-spacing="false" fo:line-height="175%" fo:orphans="2" fo:widows="2" fo:text-indent="0cm" style:auto-text-indent="false" fo:padding="0cm" fo:border="none"/>
      <style:text-properties fo:font-variant="normal" fo:text-transform="none" fo:color="#222222" loext:opacity="100%" style:font-name="Noto Sans" fo:font-size="10.5pt" fo:letter-spacing="normal" fo:font-style="normal" fo:font-weight="normal"/>
    </style:style>
    <style:style style:name="P54" style:family="paragraph" style:parent-style-name="Text_20_body" style:list-style-name="L20">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049cm" fo:border="0.06pt solid #ffffff"/>
      <style:text-properties fo:font-variant="normal" fo:text-transform="none" fo:color="#222222" loext:opacity="100%" fo:letter-spacing="normal"/>
    </style:style>
    <style:style style:name="P55" style:family="paragraph" style:parent-style-name="Text_20_body" style:list-style-name="L20">
      <style:paragraph-properties fo:margin-left="0cm" fo:margin-right="0cm" fo:margin-top="0cm" fo:margin-bottom="0cm" style:contextual-spacing="false" fo:orphans="2" fo:widows="2" fo:text-indent="0cm" style:auto-text-indent="false" fo:padding="0cm" fo:border="none"/>
    </style:style>
    <style:style style:name="P56" style:family="paragraph" style:parent-style-name="Text_20_body">
      <style:paragraph-properties fo:margin-left="0cm" fo:margin-right="0cm" fo:margin-top="0.212cm" fo:margin-bottom="0.212cm" style:contextual-spacing="false" fo:line-height="175%" fo:orphans="2" fo:widows="2" fo:text-indent="0cm" style:auto-text-indent="false"/>
      <style:text-properties fo:font-variant="normal" fo:text-transform="none" fo:color="#222222" loext:opacity="100%" style:font-name="Noto Sans" fo:font-size="10.5pt" fo:letter-spacing="normal" fo:font-style="normal" fo:font-weight="normal"/>
    </style:style>
    <style:style style:name="P57" style:family="paragraph" style:parent-style-name="Text_20_body" style:list-style-name="L21">
      <style:paragraph-properties fo:margin-left="0cm" fo:margin-right="0cm" fo:margin-top="0cm" fo:margin-bottom="0cm" style:contextual-spacing="false" fo:line-height="175%" fo:orphans="2" fo:widows="2" fo:text-indent="0cm" style:auto-text-indent="false" fo:padding="0cm" fo:border="none"/>
    </style:style>
    <style:style style:name="P58" style:family="paragraph" style:parent-style-name="Text_20_body" style:list-style-name="L21">
      <style:paragraph-properties fo:margin-left="0cm" fo:margin-right="0cm" fo:margin-top="0cm" fo:margin-bottom="0cm" style:contextual-spacing="false" fo:line-height="140%" fo:text-align="center" style:justify-single-word="false" fo:orphans="2" fo:widows="2" fo:text-indent="0cm" style:auto-text-indent="false" fo:padding="0cm" fo:border="none"/>
    </style:style>
    <style:style style:name="P59" style:family="paragraph" style:parent-style-name="Text_20_body">
      <style:paragraph-properties fo:margin-left="0cm" fo:margin-right="0cm" fo:margin-top="0cm" fo:margin-bottom="0cm" style:contextual-spacing="false" fo:line-height="175%" fo:orphans="2" fo:widows="2" fo:text-indent="0cm" style:auto-text-indent="false"/>
      <style:text-properties fo:font-variant="normal" fo:text-transform="none" fo:color="#222222" loext:opacity="100%" style:font-name="Noto Sans" fo:font-size="10.5pt" fo:letter-spacing="normal" fo:font-style="normal" fo:font-weight="normal"/>
    </style:style>
    <style:style style:name="P60" style:family="paragraph" style:parent-style-name="Text_20_body" style:list-style-name="L22">
      <style:paragraph-properties fo:margin-left="0cm" fo:margin-right="0cm" fo:margin-top="0cm" fo:margin-bottom="0cm" style:contextual-spacing="false" fo:line-height="140%" fo:text-align="center" style:justify-single-word="false" fo:orphans="2" fo:widows="2" fo:text-indent="0cm" style:auto-text-indent="false" fo:padding="0cm" fo:border="none"/>
    </style:style>
    <style:style style:name="P61" style:family="paragraph" style:parent-style-name="Heading_20_3">
      <style:paragraph-properties fo:margin-left="0cm" fo:margin-right="0cm" fo:margin-top="0cm" fo:margin-bottom="0.212cm" style:contextual-spacing="false" fo:orphans="2" fo:widows="2" fo:text-indent="0cm" style:auto-text-indent="false"/>
      <style:text-properties fo:font-variant="normal" fo:text-transform="none" fo:color="#222222" loext:opacity="100%" style:font-name="Noto Sans" fo:font-size="13.5pt" fo:letter-spacing="normal" fo:font-style="normal" fo:font-weight="bold" fo:background-color="#f4f4f4" loext:padding="0cm" loext:border="none"/>
    </style:style>
    <style:style style:name="P62" style:family="paragraph" style:parent-style-name="Text_20_body" style:list-style-name="L23">
      <style:paragraph-properties fo:margin-left="0cm" fo:margin-right="0cm" fo:margin-top="0cm" fo:margin-bottom="0cm" style:contextual-spacing="false" fo:line-height="175%" fo:orphans="2" fo:widows="2" fo:text-indent="0cm" style:auto-text-indent="false" fo:padding="0cm" fo:border="none"/>
    </style:style>
    <style:style style:name="P63" style:family="paragraph" style:parent-style-name="Text_20_body" style:list-style-name="L23">
      <style:paragraph-properties fo:margin-left="0cm" fo:margin-right="0cm" fo:margin-top="0cm" fo:margin-bottom="0cm" style:contextual-spacing="false" fo:line-height="140%" fo:text-align="center" style:justify-single-word="false" fo:orphans="2" fo:widows="2" fo:text-indent="0cm" style:auto-text-indent="false" fo:padding="0cm" fo:border="none"/>
    </style:style>
    <style:style style:name="P64" style:family="paragraph" style:parent-style-name="Text_20_body" style:list-style-name="L24">
      <style:paragraph-properties fo:margin-left="0cm" fo:margin-right="0cm" fo:margin-top="0cm" fo:margin-bottom="0cm" style:contextual-spacing="false" fo:line-height="140%" fo:text-align="center" style:justify-single-word="false" fo:orphans="2" fo:widows="2" fo:text-indent="0cm" style:auto-text-indent="false" fo:padding="0cm" fo:border="none"/>
    </style:style>
    <style:style style:name="P65" style:family="paragraph" style:parent-style-name="Text_20_body" style:list-style-name="L24">
      <style:paragraph-properties fo:margin-left="0cm" fo:margin-right="0cm" fo:margin-top="0cm" fo:margin-bottom="0cm" style:contextual-spacing="false" fo:line-height="175%" fo:orphans="2" fo:widows="2" fo:text-indent="0cm" style:auto-text-indent="false" fo:padding="0cm" fo:border="none"/>
    </style:style>
    <style:style style:name="P66" style:family="paragraph" style:parent-style-name="Text_20_body" style:list-style-name="L25">
      <style:paragraph-properties fo:margin-left="0cm" fo:margin-right="0cm" fo:margin-top="0cm" fo:margin-bottom="0cm" style:contextual-spacing="false" fo:line-height="175%" fo:orphans="2" fo:widows="2" fo:text-indent="0cm" style:auto-text-indent="false" fo:padding="0cm" fo:border="none"/>
      <style:text-properties fo:font-variant="normal" fo:text-transform="none" fo:color="#222222" loext:opacity="100%" style:font-name="Noto Sans" fo:font-size="10.5pt" fo:letter-spacing="normal" fo:font-style="normal" fo:font-weight="normal"/>
    </style:style>
    <style:style style:name="P67" style:family="paragraph" style:parent-style-name="Text_20_body">
      <style:paragraph-properties fo:margin-left="0cm" fo:margin-right="0cm" fo:margin-top="0cm" fo:margin-bottom="0cm" style:contextual-spacing="false" fo:line-height="175%" fo:orphans="2" fo:widows="2" fo:text-indent="0cm" style:auto-text-indent="false"/>
      <style:text-properties fo:font-variant="normal" fo:text-transform="none" fo:color="#222222" loext:opacity="100%" style:font-name="Noto Sans" fo:font-size="10.5pt" fo:letter-spacing="normal" fo:font-style="normal" fo:font-weight="normal" loext:padding="0cm" loext:border="none"/>
    </style:style>
    <style:style style:name="P68"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dddddd" loext:opacity="100%" style:font-name="Noto Sans" fo:font-size="10.5pt" fo:letter-spacing="normal" fo:font-style="normal" fo:font-weight="normal" fo:background-color="#f4f4f4" loext:padding="0cm" loext:border="none"/>
    </style:style>
    <style:style style:name="P69" style:family="paragraph" style:parent-style-name="Heading_20_1">
      <style:paragraph-properties fo:margin-left="0cm" fo:margin-right="0cm" fo:margin-top="0cm" fo:margin-bottom="0.318cm" style:contextual-spacing="false" fo:orphans="2" fo:widows="2" fo:text-indent="0cm" style:auto-text-indent="false"/>
      <style:text-properties fo:font-variant="normal" fo:text-transform="none" fo:color="#222222" loext:opacity="100%" style:font-name="Noto Sans" fo:font-size="13.5pt" fo:letter-spacing="normal" fo:font-style="normal" fo:font-weight="bold" fo:background-color="#f4f4f4" loext:padding="0cm" loext:border="none"/>
    </style:style>
    <style:style style:name="P70" style:family="paragraph" style:parent-style-name="Text_20_body">
      <style:paragraph-properties fo:margin-left="0cm" fo:margin-right="0cm" fo:margin-top="0cm" fo:margin-bottom="0cm" style:contextual-spacing="false" style:line-height-at-least="0.582cm" fo:orphans="2" fo:widows="2" fo:text-indent="0cm" style:auto-text-indent="false"/>
      <style:text-properties fo:font-variant="normal" fo:text-transform="none" fo:color="#222222" loext:opacity="100%" style:font-name="Noto Sans" fo:font-size="12pt" fo:letter-spacing="normal" fo:font-style="normal" fo:font-weight="bold" fo:background-color="#f4f4f4" loext:padding="0cm" loext:border="none"/>
    </style:style>
    <style:style style:name="P71" style:family="paragraph" style:parent-style-name="Text_20_body" style:list-style-name="L26">
      <style:paragraph-properties fo:margin-left="0.265cm" fo:margin-right="0cm" fo:margin-top="0cm" fo:margin-bottom="0cm" style:contextual-spacing="false" fo:line-height="175%" fo:orphans="2" fo:widows="2" fo:text-indent="0cm" style:auto-text-indent="false" fo:padding="0cm" fo:border="none"/>
      <style:text-properties fo:font-variant="normal" fo:text-transform="none" fo:color="#dddddd" loext:opacity="100%" style:font-name="Noto Sans" fo:font-size="10.5pt" fo:letter-spacing="normal" fo:font-style="normal" fo:font-weight="normal" fo:background-color="#f4f4f4" loext:padding-left="0.265cm" loext:padding-right="0cm" loext:padding-top="0cm" loext:padding-bottom="0cm" loext:border-left="0.06pt solid #dddddd" loext:border-right="none" loext:border-top="none" loext:border-bottom="none"/>
    </style:style>
    <style:style style:name="P72" style:family="paragraph" style:parent-style-name="Text_20_body" style:list-style-name="L26">
      <style:paragraph-properties fo:margin-left="0.265cm" fo:margin-right="0cm" fo:margin-top="0.212cm" fo:margin-bottom="0cm" style:contextual-spacing="false" fo:line-height="175%" fo:orphans="2" fo:widows="2" fo:text-indent="0cm" style:auto-text-indent="false" fo:padding="0cm" fo:border="none"/>
      <style:text-properties fo:font-variant="normal" fo:text-transform="none" fo:color="#dddddd" loext:opacity="100%" style:font-name="Noto Sans" fo:font-size="10.5pt" fo:letter-spacing="normal" fo:font-style="normal" fo:font-weight="normal" fo:background-color="#f4f4f4" loext:padding-left="0.265cm" loext:padding-right="0cm" loext:padding-top="0cm" loext:padding-bottom="0cm" loext:border-left="0.06pt solid #dddddd" loext:border-right="none" loext:border-top="none" loext:border-bottom="none"/>
    </style:style>
    <style:style style:name="P73" style:family="paragraph" style:parent-style-name="Text_20_body" style:list-style-name="L27">
      <style:paragraph-properties fo:margin-left="0.265cm" fo:margin-right="0cm" fo:margin-top="0cm" fo:margin-bottom="0cm" style:contextual-spacing="false" fo:line-height="175%" fo:orphans="2" fo:widows="2" fo:text-indent="0cm" style:auto-text-indent="false" fo:padding="0cm" fo:border="none"/>
    </style:style>
    <style:style style:name="P74" style:family="paragraph" style:parent-style-name="Text_20_body">
      <style:paragraph-properties fo:margin-left="0cm" fo:margin-right="0cm" fo:text-indent="0cm" style:auto-text-indent="false"/>
    </style:style>
    <style:style style:name="T1" style:family="text">
      <style:text-properties fo:font-variant="normal" fo:text-transform="none" fo:color="#222222" loext:opacity="100%" style:font-name="Noto Sans" fo:font-size="10.5pt" fo:letter-spacing="normal" fo:font-style="normal" fo:font-weight="normal" fo:background-color="#f4f4f4" loext:char-shading-value="0" loext:padding="0cm" loext:border="none"/>
    </style:style>
    <style:style style:name="T2" style:family="text">
      <style:text-properties fo:font-variant="normal" fo:text-transform="none" fo:color="#222222" loext:opacity="100%" style:font-name="Noto Sans" fo:font-size="10.5pt" fo:letter-spacing="normal" fo:font-style="normal" fo:font-weight="bold" fo:background-color="#f4f4f4" loext:char-shading-value="0" loext:padding="0cm" loext:border="none"/>
    </style:style>
    <style:style style:name="T3" style:family="text">
      <style:text-properties fo:font-variant="normal" fo:text-transform="none" fo:color="#000080" loext:opacity="100%" style:text-line-through-style="none" style:text-line-through-type="none" style:font-name="Noto Sans" fo:font-size="9pt" fo:letter-spacing="normal" fo:font-style="normal" style:text-underline-style="solid" style:text-underline-width="auto" style:text-underline-color="font-color" fo:font-weight="normal" style:text-blinking="false" fo:background-color="transparent" loext:char-shading-value="0" loext:padding="0cm" loext:border="none"/>
    </style:style>
    <style:style style:name="T4" style:family="text">
      <style:text-properties fo:font-variant="normal" fo:text-transform="none" fo:color="#767676" loext:opacity="100%" style:text-line-through-style="none" style:text-line-through-type="none" style:font-name="Noto Sans" fo:font-size="9pt" fo:letter-spacing="normal" fo:font-style="normal" style:text-underline-style="none" fo:font-weight="normal" style:text-blinking="false" fo:background-color="transparent" loext:char-shading-value="0" loext:padding="0cm" loext:border="none"/>
    </style:style>
    <style:style style:name="T5" style:family="text">
      <style:text-properties fo:font-weight="bold"/>
    </style:style>
    <style:style style:name="T6" style:family="text">
      <style:text-properties fo:font-variant="normal" fo:text-transform="none" fo:color="#222222" loext:opacity="100%" style:font-name="Noto Sans" fo:font-size="10.5pt" fo:letter-spacing="normal" fo:font-style="normal" fo:font-weight="normal"/>
    </style:style>
    <style:style style:name="T7" style:family="text">
      <style:text-properties fo:font-variant="normal" fo:text-transform="none" fo:color="#222222" loext:opacity="100%" style:font-name="Noto Sans" fo:font-size="10.5pt" fo:letter-spacing="normal" fo:font-style="normal" fo:font-weight="bold"/>
    </style:style>
    <style:style style:name="T8" style:family="text">
      <style:text-properties fo:font-variant="normal" fo:text-transform="none" fo:color="#767676" loext:opacity="100%" style:text-line-through-style="none" style:text-line-through-type="none" fo:font-size="9pt" fo:font-style="normal" style:text-underline-style="none" fo:font-weight="normal" style:text-blinking="false" fo:background-color="transparent" loext:char-shading-value="0" loext:padding="0cm" loext:border="none"/>
    </style:style>
    <style:style style:name="T9" style:family="text">
      <style:text-properties fo:font-variant="normal" fo:text-transform="none" fo:color="#222222" loext:opacity="100%" fo:letter-spacing="normal" fo:background-color="#f4f4f4" loext:char-shading-value="0" loext:padding="0cm" loext:border="none"/>
    </style:style>
    <style:style style:name="T10" style:family="text">
      <style:text-properties fo:font-variant="normal" fo:text-transform="none" fo:color="#767676" loext:opacity="100%" style:font-name="Noto Sans" fo:font-size="10.5pt" fo:letter-spacing="normal" fo:font-style="normal" fo:font-weight="normal" fo:background-color="#f4f4f4" loext:char-shading-value="0" loext:padding="0cm" loext:border="none"/>
    </style:style>
    <style:style style:name="T11" style:family="text">
      <style:text-properties loext:padding="0cm" loext:border="none"/>
    </style:style>
    <style:style style:name="T12" style:family="text">
      <style:text-properties fo:font-weight="bold" loext:padding="0cm" loext:border="none"/>
    </style:style>
    <style:style style:name="T13" style:family="text">
      <style:text-properties fo:font-variant="normal" fo:text-transform="none" fo:color="#000080" loext:opacity="100%" style:text-line-through-style="none" style:text-line-through-type="none" fo:font-size="9pt" fo:font-style="normal" style:text-underline-style="solid" style:text-underline-width="auto" style:text-underline-color="font-color" fo:font-weight="normal" style:text-blinking="false" fo:background-color="transparent"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2" text:anchor-type="page" text:anchor-page-number="1" svg:x="0cm" svg:y="0cm" svg:width="6.535cm" draw:z-index="17">
        <draw:text-box fo:min-height="6.535cm">
          <text:p text:style-name="P74"/>
        </draw:text-box>
      </draw:frame>
      <draw:frame draw:style-name="fr3" draw:name="Frame1" text:anchor-type="page" text:anchor-page-number="1" svg:x="0cm" svg:y="0cm" svg:width="6.535cm" draw:z-index="16">
        <draw:text-box fo:min-height="6.535cm">
          <text:p text:style-name="P74"/>
        </draw:text-box>
      </draw:frame>
      <text:p text:style-name="P1"/>
      <text:p text:style-name="P1"><draw:frame draw:style-name="fr1" draw:name="Image2" text:anchor-type="as-char" svg:width="7.241cm" svg:height="7.938cm" draw:z-index="0"><draw:image xlink:href="Pictures/100000000000012C0000012C9837B979.png" xlink:type="simple" xlink:show="embed" xlink:actuate="onLoad" draw:mime-type="image/png"/></draw:frame></text:p>
      <text:p text:style-name="P1"><draw:frame draw:style-name="fr1" draw:name="Image3" text:anchor-type="as-char" svg:width="7.572cm" svg:height="7.938cm" draw:z-index="1"><draw:image xlink:href="Pictures/100000000000012C0000012CEE3845AE.png" xlink:type="simple" xlink:show="embed" xlink:actuate="onLoad" draw:mime-type="image/png"/></draw:frame></text:p>
      <text:p text:style-name="P2"><draw:frame draw:style-name="fr1" draw:name="Image4" text:anchor-type="as-char" svg:width="0.609cm" svg:height="0.635cm" draw:z-index="2"><draw:image xlink:href="Pictures/1000000100000060000000605F65D74E.png" xlink:type="simple" xlink:show="embed" xlink:actuate="onLoad" draw:mime-type="image/png"/></draw:frame></text:p>
      <text:p text:style-name="P3">Design Concept: Zenith Aero Bamboo Pedicab</text:p>
      <text:section text:style-name="Sect1" text:name="anchor_undefined">
        <text:h text:style-name="P4" text:outline-level="1">Design Concept: Zenith Aero Bamboo Pedicab</text:h>
        <text:h text:style-name="P5" text:outline-level="2">Executive Summary</text:h>
        <text:p text:style-name="P6"><text:span text:style-name="T1">The </text:span><text:span text:style-name="Strong_20_Emphasis"><text:span text:style-name="T2">Zenith Aero Bamboo Pedicab</text:span></text:span><text:span text:style-name="T1"> is a premium, sustainable transportation solution designed to carry two adult passengers and one driver. By utilizing heat-treated laminated bamboo—which offers a 40% weight reduction compared to traditional steel frames—this pedicab achieves an estimated weight of </text:span><text:span text:style-name="Strong_20_Emphasis"><text:span text:style-name="T2">68–75 kg (150–165 lbs)</text:span></text:span><text:span text:style-name="T1"> </text:span><text:a xlink:type="simple" xlink:href="https://www.facebook.com/groups/1572893699951268/posts/2026494811257819/?requestId=AI_Android_4500050031336_1769944569249" office:target-frame-name="_blank" xlink:show="new" text:style-name="Internet_20_link" text:visited-style-name="Visited_20_Internet_20_Link"><text:span text:style-name="Citation"><text:span text:style-name="T3">Facebook</text:span></text:span></text:a><text:a xlink:type="simple" xlink:href="https://pedicab.com/product/the-boardwalk-pedicab/?requestId=AI_Android_4500050031336_1769944569249" office:target-frame-name="_blank" xlink:show="new" text:style-name="Internet_20_link" text:visited-style-name="Visited_20_Internet_20_Link"><text:span text:style-name="Citation"><text:span text:style-name="T3">Pedicab</text:span></text:span></text:a><text:span text:style-name="T1">. Equipped with a weather-resistant cloth canopy </text:span><text:soft-page-break/><text:span text:style-name="T1">and an aerodynamic silhouette, it balances the organic vibration-damping properties of bamboo with the structural rigidity required for commercial passenger service </text:span><text:a xlink:type="simple" xlink:href="https://bamboocycles.com/whybamboo/?requestId=AI_Android_4500050031336_1769944569249" office:target-frame-name="_blank" xlink:show="new" text:style-name="Internet_20_link" text:visited-style-name="Visited_20_Internet_20_Link"><text:span text:style-name="Citation"><text:span text:style-name="T3">Bamboocycles</text:span></text:span></text:a><text:a xlink:type="simple" xlink:href="https://www.sanantonio.gov/portals/0/files/sapd/gtu/PedicabsR-R.pdf?requestId=AI_Android_4500050031336_1769944569249" office:target-frame-name="_blank" xlink:show="new" text:style-name="Internet_20_link" text:visited-style-name="Visited_20_Internet_20_Link"><text:span text:style-name="Citation"><text:span text:style-name="T3">Sanantonio</text:span></text:span></text:a><text:span text:style-name="T1">.</text:span></text:p>
        <text:p text:style-name="P7"/>
        <text:h text:style-name="P5" text:outline-level="2">Technical Feasibility &amp; Structural Logic</text:h>
        <text:p text:style-name="P6"><text:span text:style-name="T1">Traditional steel pedicabs often weigh over 130 kg when electrified, or approximately 80 kg for non-electric models </text:span><text:a xlink:type="simple" xlink:href="https://www.amazon.com/cozytrikes-Bicycle-Rickshaw-Five-Person-Electric/dp/B0CXXNF5NV?requestId=AI_Android_4500050031336_1769944569249" office:target-frame-name="_blank" xlink:show="new" text:style-name="Internet_20_link" text:visited-style-name="Visited_20_Internet_20_Link"><text:span text:style-name="Citation"><text:span text:style-name="T3">Amazon</text:span></text:span></text:a><text:a xlink:type="simple" xlink:href="https://pedicab.com/product/the-boardwalk-pedicab/?requestId=AI_Android_4500050031336_1769944569249" office:target-frame-name="_blank" xlink:show="new" text:style-name="Internet_20_link" text:visited-style-name="Visited_20_Internet_20_Link"><text:span text:style-name="Citation"><text:span text:style-name="T3">Pedicab</text:span></text:span></text:a><text:span text:style-name="T1">. Transitioning to a laminated bamboo frame significantly lowers the vehicle's base mass without compromising safety.</text:span></text:p>
        <text:list text:style-name="L1">
          <text:list-item>
            <text:p text:style-name="P8"><text:span text:style-name="Strong_20_Emphasis"><text:span text:style-name="T2">Load Capacity</text:span></text:span><text:span text:style-name="T1">: Despite its lightweight frame, the Zenith Aero architecture is designed to support a total payload of up to </text:span><text:span text:style-name="Strong_20_Emphasis"><text:span text:style-name="T2">250 kg (550 lbs)</text:span></text:span><text:span text:style-name="T1">, accommodating two average-sized adults and a driver </text:span><text:a xlink:type="simple" xlink:href="https://revolutionrickshaws.com/faqs/event-experiences-faqs/?requestId=AI_Android_4500050031336_1769944569249" office:target-frame-name="_blank" xlink:show="new" text:style-name="Internet_20_link" text:visited-style-name="Visited_20_Internet_20_Link"><text:span text:style-name="Citation"><text:span text:style-name="T4">Revolutionrickshaws</text:span></text:span></text:a><text:span text:style-name="T1">.</text:span></text:p>
          </text:list-item>
          <text:list-item>
            <text:p text:style-name="P8"><text:span text:style-name="Strong_20_Emphasis"><text:span text:style-name="T2">Dimensional Integrity</text:span></text:span><text:span text:style-name="T1">: To ensure stability, the frame follows industry-standard dimensions of approximately </text:span><text:span text:style-name="Strong_20_Emphasis"><text:span text:style-name="T2">110 inches in length and 50 inches in width</text:span></text:span><text:span text:style-name="T1">, providing a 30-inch wide passenger bench for comfort </text:span><text:a xlink:type="simple" xlink:href="https://www.amazon.com/cozytrikes-Bicycle-Rickshaw-Five-Person-Electric/dp/B0CXXNF5NV?requestId=AI_Android_4500050031336_1769944569249" office:target-frame-name="_blank" xlink:show="new" text:style-name="Internet_20_link" text:visited-style-name="Visited_20_Internet_20_Link"><text:span text:style-name="Citation"><text:span text:style-name="T3">Amazon</text:span></text:span></text:a><text:a xlink:type="simple" xlink:href="https://austinpedicab.org/austin-pedicab-safety-meeting-nov-20-2008/?requestId=AI_Android_4500050031336_1769944569249" office:target-frame-name="_blank" xlink:show="new" text:style-name="Internet_20_link" text:visited-style-name="Visited_20_Internet_20_Link"><text:span text:style-name="Citation"><text:span text:style-name="T3">Austinpedicab</text:span></text:span></text:a><text:span text:style-name="T1">.</text:span></text:p>
          </text:list-item>
          <text:list-item>
            <text:p text:style-name="P8"><text:span text:style-name="Strong_20_Emphasis"><text:span text:style-name="T2">Vibration Damping</text:span></text:span><text:span text:style-name="T1">: The cellular structure of bamboo naturally absorbs road shocks better than aluminum or carbon fiber, providing a "premium ride" quality for passengers without the need for heavy suspension systems </text:span><text:a xlink:type="simple" xlink:href="https://www.sanantonio.gov/portals/0/files/sapd/gtu/PedicabsR-R.pdf?requestId=AI_Android_4500050031336_1769944569249" office:target-frame-name="_blank" xlink:show="new" text:style-name="Internet_20_link" text:visited-style-name="Visited_20_Internet_20_Link"><text:span text:style-name="Citation"><text:span text:style-name="T4">Sanantonio</text:span></text:span></text:a><text:span text:style-name="T1">.</text:span></text:p>
          </text:list-item>
        </text:list>
        <text:p text:style-name="P7"/>
        <text:h text:style-name="P5" text:outline-level="2">Design Proposals</text:h>
        <text:h text:style-name="P9" text:outline-level="3">Proposal 1: The Urban Glider — Minimalist Zenith Style</text:h>
        <text:p text:style-name="P10"><text:span text:style-name="Strong_20_Emphasis"><text:span text:style-name="T2">Positioning &amp; Value</text:span></text:span></text:p>
        <text:list text:style-name="L2">
          <text:list-item>
            <text:p text:style-name="P11"><text:span text:style-name="Strong_20_Emphasis"><text:span text:style-name="T2">Positioning</text:span></text:span><text:span text:style-name="T1">: A high-efficiency city pedicab for tour operators and premium urban shuttle services.</text:span></text:p>
          </text:list-item>
          <text:list-item>
            <text:p text:style-name="P11"><text:span text:style-name="Strong_20_Emphasis"><text:span text:style-name="T2">User Value</text:span></text:span><text:span text:style-name="T1">: The ultra-lightweight frame and thin-profile cloth canopy reduce drag and driver fatigue, making long shifts more manageable.</text:span></text:p>
          </text:list-item>
          <text:list-item>
            <text:p text:style-name="P11"><text:span text:style-name="Strong_20_Emphasis"><text:span text:style-name="T2">Business Value</text:span></text:span><text:span text:style-name="T1">: High "curb appeal" and iconic design allow for premium fare pricing; the simplified canopy structure reduces maintenance costs.</text:span></text:p>
          </text:list-item>
        </text:list>
        <text:p text:style-name="P10"><text:span text:style-name="Strong_20_Emphasis"><text:span text:style-name="T2">Hero Visual</text:span></text:span></text:p>
        <text:p text:style-name="P12">This design features the signature laminated bamboo curves of the Zenith Aero series with a lightweight grey cloth canopy.</text:p>
        <text:p text:style-name="P13"><text:soft-page-break/><draw:frame draw:style-name="fr1" draw:name="Image5" text:anchor-type="as-char" svg:width="7.751cm" svg:height="7.938cm" draw:z-index="3"><draw:image xlink:href="Pictures/100000000000012C0000012CCF4C2302.png" xlink:type="simple" xlink:show="embed" xlink:actuate="onLoad" draw:mime-type="image/png"/></draw:frame></text:p>
        <text:p text:style-name="P10"><text:span text:style-name="Strong_20_Emphasis"><text:span text:style-name="T2">Key Specs</text:span></text:span></text:p>
        <table:table table:name="Table1" table:style-name="Table1">
          <table:table-column table:style-name="Table1.A"/>
          <table:table-column table:style-name="Table1.B"/>
          <table:table-header-rows>
            <table:table-row>
              <table:table-cell table:style-name="Table1.A1" office:value-type="string">
                <text:p text:style-name="P14">Field</text:p>
              </table:table-cell>
              <table:table-cell table:style-name="Table1.A1" office:value-type="string">
                <text:p text:style-name="P14">Content</text:p>
              </table:table-cell>
            </table:table-row>
          </table:table-header-rows>
          <table:table-row>
            <table:table-cell table:style-name="Table1.A2" office:value-type="string">
              <text:p text:style-name="P15"><text:span text:style-name="Strong_20_Emphasis"><text:span text:style-name="T5">Primary Material</text:span></text:span></text:p>
            </table:table-cell>
            <table:table-cell table:style-name="Table1.B2" office:value-type="string">
              <text:p text:style-name="P15">Heat-treated laminated bamboo (Zenith Aero grade)</text:p>
            </table:table-cell>
          </table:table-row>
          <table:table-row>
            <table:table-cell table:style-name="Table1.A3" office:value-type="string">
              <text:p text:style-name="P15"><text:span text:style-name="Strong_20_Emphasis"><text:span text:style-name="T5">Canopy Type</text:span></text:span></text:p>
            </table:table-cell>
            <table:table-cell table:style-name="Table1.B3" office:value-type="string">
              <text:p text:style-name="P15">Fixed minimalist cloth with bamboo support struts</text:p>
            </table:table-cell>
          </table:table-row>
          <table:table-row>
            <table:table-cell table:style-name="Table1.A4" office:value-type="string">
              <text:p text:style-name="P15"><text:span text:style-name="Strong_20_Emphasis"><text:span text:style-name="T5">Seating Capacity</text:span></text:span></text:p>
            </table:table-cell>
            <table:table-cell table:style-name="Table1.B4" office:value-type="string">
              <text:p text:style-name="P15">1 Driver + 2 Adult Passengers (30" rear bench)</text:p>
            </table:table-cell>
          </table:table-row>
          <table:table-row>
            <table:table-cell table:style-name="Table1.A5" office:value-type="string">
              <text:p text:style-name="P15"><text:span text:style-name="Strong_20_Emphasis"><text:span text:style-name="T5">Approx. Weight</text:span></text:span></text:p>
            </table:table-cell>
            <table:table-cell table:style-name="Table1.B5" office:value-type="string">
              <text:p text:style-name="P15">68 kg (Non-electric configuration)</text:p>
            </table:table-cell>
          </table:table-row>
          <table:table-row>
            <table:table-cell table:style-name="Table1.A6" office:value-type="string">
              <text:p text:style-name="P15"><text:span text:style-name="Strong_20_Emphasis"><text:span text:style-name="T5">Dimensions</text:span></text:span></text:p>
            </table:table-cell>
            <table:table-cell table:style-name="Table1.B6" office:value-type="string">
              <text:p text:style-name="P15">279cm L x 127cm W (110" x 50")</text:p>
            </table:table-cell>
          </table:table-row>
          <table:table-row>
            <table:table-cell table:style-name="Table1.A7" office:value-type="string">
              <text:p text:style-name="P15"><text:span text:style-name="Strong_20_Emphasis"><text:span text:style-name="T5">Load Capacity</text:span></text:span></text:p>
            </table:table-cell>
            <table:table-cell table:style-name="Table1.B7" office:value-type="string">
              <text:p text:style-name="P15">250 kg (Static/Dynamic safety rated)</text:p>
            </table:table-cell>
          </table:table-row>
          <table:table-row>
            <table:table-cell table:style-name="Table1.A8" office:value-type="string">
              <text:p text:style-name="P15"><text:span text:style-name="Strong_20_Emphasis"><text:span text:style-name="T5">Target Cost</text:span></text:span></text:p>
            </table:table-cell>
            <table:table-cell table:style-name="Table1.B8" office:value-type="string">
              <text:p text:style-name="P16">BOM $800 - $1,100 / Retail $3,200+</text:p>
            </table:table-cell>
          </table:table-row>
        </table:table>
        <text:p text:style-name="P7"/>
        <text:h text:style-name="P9" text:outline-level="3">Proposal 2: The Voyager — Luxe Laminated Concept</text:h>
        <text:p text:style-name="P10"><text:span text:style-name="Strong_20_Emphasis"><text:span text:style-name="T2">Positioning &amp; Value</text:span></text:span></text:p>
        <text:list text:style-name="L3">
          <text:list-item>
            <text:p text:style-name="P17"><text:span text:style-name="Strong_20_Emphasis"><text:span text:style-name="T2">Positioning</text:span></text:span><text:span text:style-name="T1">: An eco-luxury resort vehicle designed for hospitality groups and private estates.</text:span></text:p>
          </text:list-item>
          <text:list-item>
            <text:p text:style-name="P17"><text:span text:style-name="Strong_20_Emphasis"><text:span text:style-name="T2">User Value</text:span></text:span><text:span text:style-name="T1">: Features deeper, heat-treated dark bamboo for a mahogany-like finish and a semi-translucent canopy for a brighter passenger cabin.</text:span></text:p>
          </text:list-item>
          <text:list-item>
            <text:p text:style-name="P17"><text:soft-page-break/><text:span text:style-name="Strong_20_Emphasis"><text:span text:style-name="T2">Business Value</text:span></text:span><text:span text:style-name="T1">: Positions the pedicab as a "functional art" piece; lower production volume but significantly higher retail margins in the luxury sector.</text:span></text:p>
          </text:list-item>
        </text:list>
        <text:p text:style-name="P10"><text:span text:style-name="Strong_20_Emphasis"><text:span text:style-name="T2">Hero Visual</text:span></text:span></text:p>
        <text:p text:style-name="P12">This render showcases the flowing curves and dark-tone lamination combined with a futuristic semi-translucent cloth top.</text:p>
        <text:p text:style-name="P13"><draw:frame draw:style-name="fr1" draw:name="Image6" text:anchor-type="as-char" svg:width="7.163cm" svg:height="7.938cm" draw:z-index="4"><draw:image xlink:href="Pictures/100000000000012C0000012C9837B979.png" xlink:type="simple" xlink:show="embed" xlink:actuate="onLoad" draw:mime-type="image/png"/></draw:frame></text:p>
        <text:p text:style-name="P18">finish view</text:p>
      </text:section>
      <text:p text:style-name="P19">To move this project forward, you might want to:</text:p>
      <text:list text:style-name="L4">
        <text:list-item>
          <text:p text:style-name="P20">Calculate the additional weight and range for an electric assist motor (approx. 8–12 kg)?</text:p>
        </text:list-item>
        <text:list-item>
          <text:p text:style-name="P20">Refine the engineering of the retractable canopy for all-weather commercial use?</text:p>
        </text:list-item>
        <text:list-item>
          <text:p text:style-name="P20">Find manufacturing partners specializing in high-precision laminated bamboo structures?</text:p>
        </text:list-item>
      </text:list>
      <text:p text:style-name="P21">finish view</text:p>
      <text:p text:style-name="P22">can you substitute rattan for bamboo?</text:p>
      <text:p text:style-name="P23">Show thought process</text:p>
      <text:list text:style-name="L5">
        <text:list-item>
          <text:p text:style-name="P24"><draw:frame draw:style-name="fr1" draw:name="Image7" text:anchor-type="as-char" svg:width="0.423cm" svg:height="0.423cm" draw:z-index="5"><draw:image xlink:href="Pictures/100000000000001C0000001CC0E54F40.png" xlink:type="simple" xlink:show="embed" xlink:actuate="onLoad" draw:mime-type="image/png"/></draw:frame></text:p>
        </text:list-item>
        <text:list-item>
          <text:p text:style-name="P24"><draw:frame draw:style-name="fr1" draw:name="Image8" text:anchor-type="as-char" svg:width="0.423cm" svg:height="0.423cm" draw:z-index="6"><draw:image xlink:href="Pictures/100000010000001C0000001CBBED62E2.png" xlink:type="simple" xlink:show="embed" xlink:actuate="onLoad" draw:mime-type="image/png"/></draw:frame></text:p>
        </text:list-item>
        <text:list-item>
          <text:p text:style-name="P24"><draw:frame draw:style-name="fr1" draw:name="Image9" text:anchor-type="as-char" svg:width="0.423cm" svg:height="0.423cm" draw:z-index="7"><draw:image xlink:href="Pictures/100000010000001000000010E4BD1997.png" xlink:type="simple" xlink:show="embed" xlink:actuate="onLoad" draw:mime-type="image/png"/></draw:frame></text:p>
        </text:list-item>
      </text:list>
      <text:p text:style-name="P25">28 sources</text:p>
      <text:p text:style-name="P6"><text:span text:style-name="T6">While rattan can technically replace bamboo in certain elements, a </text:span><text:span text:style-name="Strong_20_Emphasis"><text:span text:style-name="T7">1:1 substitution is not recommended</text:span></text:span><text:span text:style-name="T6"> for the primary load-bearing chassis of a pedicab. Bamboo’s hollow, tubular structure provides the high tensile and compressive strength necessary for a rigid vehicle "spine," whereas </text:span><text:soft-page-break/><text:span text:style-name="T6">rattan’s solid core is inherently more flexible, making it ideal for the curved, ergonomic sections of the passenger cabin </text:span><text:a xlink:type="simple" xlink:href="https://www.quora.com/Which-is-stronger-between-rattan-or-bamboo-Why?requestId=AI_Android_4500050031336_1769944920164" office:target-frame-name="_blank" xlink:show="new" text:style-name="Internet_20_link" text:visited-style-name="Visited_20_Internet_20_Link"><text:span text:style-name="Citation"><text:span text:style-name="T3">Quora</text:span></text:span></text:a><text:a xlink:type="simple" xlink:href="https://www.maisonflaneur.com/blogs/flaneur-magazine/rattan-is-a-summer-staple-heres-everything-you-need-to-know?requestId=AI_Android_4500050031336_1769944920164" office:target-frame-name="_blank" xlink:show="new" text:style-name="Internet_20_link" text:visited-style-name="Visited_20_Internet_20_Link"><text:span text:style-name="Citation"><text:span text:style-name="T3">Maisonflaneur</text:span></text:span></text:a><text:span text:style-name="T6">.</text:span></text:p>
      <text:p text:style-name="P6"><text:span text:style-name="T6">For a pedicab carrying a </text:span><text:span text:style-name="Strong_20_Emphasis"><text:span text:style-name="T7">250kg</text:span></text:span><text:span text:style-name="T6"> total payload (two adults plus a driver), a </text:span><text:span text:style-name="Strong_20_Emphasis"><text:span text:style-name="T7">hybrid material strategy</text:span></text:span><text:span text:style-name="T6"> is the most effective approach. This uses bamboo for the structural chassis to prevent frame sag and steam-bent rattan for the canopy supports and woven seating to maximize passenger comfort and vibration damping </text:span><text:a xlink:type="simple" xlink:href="https://indochinalight.com/blogs/pendant-lights/what-is-rattan?requestId=AI_Android_4500050031336_1769944920164" office:target-frame-name="_blank" xlink:show="new" text:style-name="Internet_20_link" text:visited-style-name="Visited_20_Internet_20_Link"><text:span text:style-name="Citation"><text:span text:style-name="T4">Indochinalight</text:span></text:span></text:a><text:span text:style-name="T6">.</text:span></text:p>
      <text:p text:style-name="P26"/>
      <text:p text:style-name="P26"><draw:frame draw:style-name="fr1" draw:name="Image11" text:anchor-type="as-char" svg:width="8.006cm" svg:height="7.938cm" draw:z-index="8"><draw:image xlink:href="Pictures/100000000000012C0000012C396A488D.png" xlink:type="simple" xlink:show="embed" xlink:actuate="onLoad" draw:mime-type="image/png"/></draw:frame></text:p>
      <text:p text:style-name="P26"/>
      <text:p text:style-name="P10"><text:span text:style-name="T6">The hybrid configuration results in a total system weight of approximately </text:span><text:span text:style-name="Strong_20_Emphasis"><text:span text:style-name="T7">78–85 kg</text:span></text:span><text:span text:style-name="T6">. While slightly heavier than a pure bamboo frame due to rattan's solid density, it offers superior aesthetics and a more luxurious "boutique" ride quality. Detailed structural comparisons and specific hybrid design proposals are provided in the technical report below.</text:span></text:p>
      <text:p text:style-name="P27"><draw:frame draw:style-name="fr1" draw:name="Image13" text:anchor-type="as-char" svg:width="0.609cm" svg:height="0.635cm" draw:z-index="9"><draw:image xlink:href="Pictures/1000000100000060000000605F65D74E.png" xlink:type="simple" xlink:show="embed" xlink:actuate="onLoad" draw:mime-type="image/png"/></draw:frame></text:p>
      <text:p text:style-name="P28">Material Substitution Report: Bamboo Vs. Rattan In Pedicab Design</text:p>
      <text:section text:style-name="Sect1" text:name="Section1">
        <text:h text:style-name="P4" text:outline-level="1"><text:bookmark text:name="anchor_undefined"/>Material Analysis: Substituting Rattan for Bamboo in Pedicab Design</text:h>
        <text:h text:style-name="P5" text:outline-level="2">Executive Summary</text:h>
        <text:p text:style-name="P6"><text:span text:style-name="T1">While rattan can technically substitute for bamboo in decorative or curved elements, it is </text:span><text:span text:style-name="Strong_20_Emphasis"><text:span text:style-name="T2">not recommended as a direct 1:1 replacement</text:span></text:span><text:span text:style-name="T1"> for the primary load-bearing chassis of a passenger pedicab. Bamboo’s hollow, tube-like structure provides superior tensile and compressive strength for </text:span><text:soft-page-break/><text:span text:style-name="T1">straight, long-span structural members, whereas rattan’s solid core is better suited for complex curves, ergonomic seating, and vibration-damping accents </text:span><text:a xlink:type="simple" xlink:href="https://www.quora.com/Which-is-stronger-between-rattan-or-bamboo-Why?requestId=AI_Android_4500050031336_1769944920164" office:target-frame-name="_blank" xlink:show="new" text:style-name="Internet_20_link" text:visited-style-name="Visited_20_Internet_20_Link"><text:span text:style-name="Citation"><text:span text:style-name="T3">Quora</text:span></text:span></text:a><text:a xlink:type="simple" xlink:href="https://www.maisonflaneur.com/blogs/flaneur-magazine/rattan-is-a-summer-staple-heres-everything-you-need-to-know?requestId=AI_Android_4500050031336_1769944920164" office:target-frame-name="_blank" xlink:show="new" text:style-name="Internet_20_link" text:visited-style-name="Visited_20_Internet_20_Link"><text:span text:style-name="Citation"><text:span text:style-name="T3">Maisonflaneur</text:span></text:span></text:a><text:span text:style-name="T1">. For the </text:span><text:span text:style-name="Strong_20_Emphasis"><text:span text:style-name="T2">Zenith Aero Pedicab</text:span></text:span><text:span text:style-name="T1">, a </text:span><text:span text:style-name="Strong_20_Emphasis"><text:span text:style-name="T2">hybrid material strategy</text:span></text:span><text:span text:style-name="T1"> is the most effective approach: utilizing bamboo for the rigid "spine" and rattan for the curved canopy supports and woven passenger cabin.</text:span></text:p>
        <text:p text:style-name="P7"/>
        <text:h text:style-name="P5" text:outline-level="2">Structural Comparison: Bamboo vs. Rattan</text:h>
        <text:p text:style-name="P29">Choosing between these materials requires balancing the rigid structural requirements of a vehicle with the aesthetic and comfort needs of passenger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4">Feature</text:p>
              </table:table-cell>
              <table:table-cell table:style-name="Table2.A1" office:value-type="string">
                <text:p text:style-name="P14">Bamboo (Hollow Tube)</text:p>
              </table:table-cell>
              <table:table-cell table:style-name="Table2.A1" office:value-type="string">
                <text:p text:style-name="P14">Rattan (Solid Core)</text:p>
              </table:table-cell>
            </table:table-row>
          </table:table-header-rows>
          <table:table-row>
            <table:table-cell table:style-name="Table2.A2" office:value-type="string">
              <text:p text:style-name="P15"><text:span text:style-name="Strong_20_Emphasis"><text:span text:style-name="T5">Structural Role</text:span></text:span></text:p>
            </table:table-cell>
            <table:table-cell table:style-name="Table2.B2" office:value-type="string">
              <text:p text:style-name="P30">Primary chassis, load-bearing spines <text:a xlink:type="simple" xlink:href="https://www.maisonflaneur.com/blogs/flaneur-magazine/rattan-is-a-summer-staple-heres-everything-you-need-to-know?requestId=AI_Android_4500050031336_1769944920164" office:target-frame-name="_blank" xlink:show="new" text:style-name="Internet_20_link" text:visited-style-name="Visited_20_Internet_20_Link"><text:span text:style-name="Citation"><text:span text:style-name="T8">Maisonflaneur</text:span></text:span></text:a></text:p>
            </table:table-cell>
            <table:table-cell table:style-name="Table2.C2" office:value-type="string">
              <text:p text:style-name="P15">Curved supports, seating, aesthetic accents</text:p>
            </table:table-cell>
          </table:table-row>
          <table:table-row>
            <table:table-cell table:style-name="Table2.A3" office:value-type="string">
              <text:p text:style-name="P15"><text:span text:style-name="Strong_20_Emphasis"><text:span text:style-name="T5">Flexibility</text:span></text:span></text:p>
            </table:table-cell>
            <table:table-cell table:style-name="Table2.B3" office:value-type="string">
              <text:p text:style-name="P15">Rigid; difficult to bend without cracking</text:p>
            </table:table-cell>
            <table:table-cell table:style-name="Table2.C3" office:value-type="string">
              <text:p text:style-name="P30">Extremely pliable; can be steam-bent into complex "S" shapes <text:a xlink:type="simple" xlink:href="https://indochinalight.com/blogs/pendant-lights/what-is-rattan?requestId=AI_Android_4500050031336_1769944920164" office:target-frame-name="_blank" xlink:show="new" text:style-name="Internet_20_link" text:visited-style-name="Visited_20_Internet_20_Link"><text:span text:style-name="Citation"><text:span text:style-name="T8">Indochinalight</text:span></text:span></text:a></text:p>
            </table:table-cell>
          </table:table-row>
          <table:table-row>
            <table:table-cell table:style-name="Table2.A4" office:value-type="string">
              <text:p text:style-name="P15"><text:span text:style-name="Strong_20_Emphasis"><text:span text:style-name="T5">Strength</text:span></text:span></text:p>
            </table:table-cell>
            <table:table-cell table:style-name="Table2.B4" office:value-type="string">
              <text:p text:style-name="P30">High tensile strength; resists "sagging" under passenger weight <text:a xlink:type="simple" xlink:href="https://bambu-bicycles.com/why-bamboo-bikes/?requestId=AI_Android_4500050031336_1769944920164" office:target-frame-name="_blank" xlink:show="new" text:style-name="Internet_20_link" text:visited-style-name="Visited_20_Internet_20_Link"><text:span text:style-name="Citation"><text:span text:style-name="T8">Bambu-Bicycles</text:span></text:span></text:a></text:p>
            </table:table-cell>
            <table:table-cell table:style-name="Table2.C4" office:value-type="string">
              <text:p text:style-name="P30">Durable and tough, but tends to flex more under high tension <text:a xlink:type="simple" xlink:href="https://194crafthouse.com/blogs/inspiration/what-is-rattan-and-everything-you-need-to-know-it?requestId=AI_Android_4500050031336_1769944920164" office:target-frame-name="_blank" xlink:show="new" text:style-name="Internet_20_link" text:visited-style-name="Visited_20_Internet_20_Link"><text:span text:style-name="Citation"><text:span text:style-name="T8">194Crafthouse</text:span></text:span></text:a></text:p>
            </table:table-cell>
          </table:table-row>
          <table:table-row>
            <table:table-cell table:style-name="Table2.A5" office:value-type="string">
              <text:p text:style-name="P15"><text:span text:style-name="Strong_20_Emphasis"><text:span text:style-name="T5">Weight Profile</text:span></text:span></text:p>
            </table:table-cell>
            <table:table-cell table:style-name="Table2.B5" office:value-type="string">
              <text:p text:style-name="P30">Lightweight due to hollow center (~1.2kg per frame) <text:a xlink:type="simple" xlink:href="https://www.facebook.com/groups/1572893699951268/posts/2026494811257819/?requestId=AI_Android_4500050031336_1769944920164" office:target-frame-name="_blank" xlink:show="new" text:style-name="Internet_20_link" text:visited-style-name="Visited_20_Internet_20_Link"><text:span text:style-name="Citation"><text:span text:style-name="T8">Facebook</text:span></text:span></text:a></text:p>
            </table:table-cell>
            <table:table-cell table:style-name="Table2.C5" office:value-type="string">
              <text:p text:style-name="P30">Denser and heavier due to solid core structure <text:a xlink:type="simple" xlink:href="https://indochinalight.com/blogs/pendant-lights/what-is-rattan?requestId=AI_Android_4500050031336_1769944920164" office:target-frame-name="_blank" xlink:show="new" text:style-name="Internet_20_link" text:visited-style-name="Visited_20_Internet_20_Link"><text:span text:style-name="Citation"><text:span text:style-name="T8">Indochinalight</text:span></text:span></text:a></text:p>
            </table:table-cell>
          </table:table-row>
        </table:table>
        <text:h text:style-name="P9" text:outline-level="3">Performance Impact</text:h>
        <text:list text:style-name="L6">
          <text:list-item>
            <text:p text:style-name="P31"><text:span text:style-name="Strong_20_Emphasis"><text:span text:style-name="T2">Vertical Rigidity</text:span></text:span><text:span text:style-name="T1">: A pure rattan frame would likely experience significant "flex" when carrying two adults, potentially leading to handling instability. Bamboo’s rigidity ensures the wheels remain aligned under a 250kg payload </text:span><text:a xlink:type="simple" xlink:href="https://revolutionrickshaws.com/faqs/event-experiences-faqs/?requestId=AI_Android_4500050031336_1769944920164" office:target-frame-name="_blank" xlink:show="new" text:style-name="Internet_20_link" text:visited-style-name="Visited_20_Internet_20_Link"><text:span text:style-name="Citation"><text:span text:style-name="T4">Revolutionrickshaws</text:span></text:span></text:a><text:span text:style-name="T1">.</text:span></text:p>
          </text:list-item>
          <text:list-item>
            <text:p text:style-name="P31"><text:span text:style-name="Strong_20_Emphasis"><text:span text:style-name="T2">Impact Resistance</text:span></text:span><text:span text:style-name="T1">: Bamboo absorbs 50% more impact force than steel, providing a safety buffer for the driver and passengers </text:span><text:a xlink:type="simple" xlink:href="https://www.facebook.com/groups/1572893699951268/posts/2026494811257819/?requestId=AI_Android_4500050031336_1769944920164" office:target-frame-name="_blank" xlink:show="new" text:style-name="Internet_20_link" text:visited-style-name="Visited_20_Internet_20_Link"><text:span text:style-name="Citation"><text:span text:style-name="T4">Facebook</text:span></text:span></text:a><text:span text:style-name="T1">. Rattan is best used for the </text:span><text:span text:style-name="Strong_20_Emphasis"><text:span text:style-name="T2">passenger pod</text:span></text:span><text:span text:style-name="T1">, where its natural give provides a "suspension-like" feel in the seat.</text:span></text:p>
          </text:list-item>
        </text:list>
        <text:p text:style-name="P7"/>
        <text:h text:style-name="P5" text:outline-level="2"><text:soft-page-break/>Hybrid Pedicab Design Proposals</text:h>
        <text:p text:style-name="P29">These concepts adapt the "Zenith Aero" silhouette to incorporate rattan’s unique bending capabilities while maintaining bamboo's structural integrity.</text:p>
        <text:h text:style-name="P9" text:outline-level="3">Proposal 1: The Luxe Hybrid — Laminated Spine with Woven Cabin</text:h>
        <text:p text:style-name="P10"><text:span text:style-name="T1">This design uses the rigid laminated bamboo from the Zenith Aero for the main drivetrain and chassis, but replaces the rear passenger area with a steam-bent rattan "cage" and a traditional </text:span><text:span text:style-name="Emphasis"><text:span text:style-name="T1">solihiya</text:span></text:span><text:span text:style-name="T1"> weave for the seat.</text:span></text:p>
        <text:p text:style-name="P13"><draw:frame draw:style-name="fr1" draw:name="Image14" text:anchor-type="as-char" svg:width="7.904cm" svg:height="7.938cm" draw:z-index="10"><draw:image xlink:href="Pictures/100000000000012C0000012CD65EAC4B.png" xlink:type="simple" xlink:show="embed" xlink:actuate="onLoad" draw:mime-type="image/png"/></draw:frame></text:p>
        <text:list text:style-name="L7">
          <text:list-item>
            <text:p text:style-name="P32"><text:span text:style-name="Strong_20_Emphasis"><text:span text:style-name="T2">Key Specs</text:span></text:span><text:span text:style-name="T1">:</text:span></text:p>
            <text:list>
              <text:list-item>
                <text:p text:style-name="P32"><text:span text:style-name="Strong_20_Emphasis"><text:span text:style-name="T2">Frame</text:span></text:span><text:span text:style-name="T1">: Laminated 7-ply Bamboo</text:span></text:p>
              </text:list-item>
              <text:list-item>
                <text:p text:style-name="P33"><text:span text:style-name="Strong_20_Emphasis"><text:span text:style-name="T2">Accents</text:span></text:span><text:span text:style-name="T1">: Steam-bent Manau Rattan canopy struts </text:span><text:a xlink:type="simple" xlink:href="https://indochinalight.com/blogs/pendant-lights/what-is-rattan?requestId=AI_Android_4500050031336_1769944920164" office:target-frame-name="_blank" xlink:show="new" text:style-name="Internet_20_link" text:visited-style-name="Visited_20_Internet_20_Link"><text:span text:style-name="Citation"><text:span text:style-name="T4">Indochinalight</text:span></text:span></text:a></text:p>
              </text:list-item>
              <text:list-item>
                <text:p text:style-name="P32"><text:span text:style-name="Strong_20_Emphasis"><text:span text:style-name="T2">Weight Estimate</text:span></text:span><text:span text:style-name="T1">: </text:span><text:span text:style-name="Strong_20_Emphasis"><text:span text:style-name="T2">78–82 kg</text:span></text:span><text:span text:style-name="T1"> (slightly heavier than pure bamboo due to solid rattan core)</text:span></text:p>
              </text:list-item>
              <text:list-item>
                <text:p text:style-name="P33"><text:span text:style-name="Strong_20_Emphasis"><text:span text:style-name="T2">Passenger Comfort</text:span></text:span><text:span text:style-name="T1">: High-vibration damping via woven rattan seating </text:span><text:a xlink:type="simple" xlink:href="https://atc-craft.com/what-is-rattan/?requestId=AI_Android_4500050031336_1769944920164" office:target-frame-name="_blank" xlink:show="new" text:style-name="Internet_20_link" text:visited-style-name="Visited_20_Internet_20_Link"><text:span text:style-name="Citation"><text:span text:style-name="T4">Atc-Craft</text:span></text:span></text:a></text:p>
              </text:list-item>
            </text:list>
          </text:list-item>
        </text:list>
        <text:h text:style-name="P9" text:outline-level="3">Proposal 2: The Aero-Wicker — Integrated Cargo/Passenger Pod</text:h>
        <text:p text:style-name="P12">A futuristic take where the passenger cabin is a structural wicker-style basket integrated into a heavy-duty bamboo chassis. The cloth canopy is supported by a continuous rattan loop.</text:p>
        <text:p text:style-name="P13"><text:soft-page-break/><draw:frame draw:style-name="fr2" draw:name="Image15" text:anchor-type="as-char" svg:y="-8.269cm" svg:width="8.056cm" svg:height="7.938cm" draw:z-index="11"><draw:image xlink:href="Pictures/100000000000012C0000012C396A488D.png" xlink:type="simple" xlink:show="embed" xlink:actuate="onLoad" draw:mime-type="image/png"/></draw:frame></text:p>
        <text:p text:style-name="P18">finish view</text:p>
      </text:section>
      <text:p text:style-name="P19">Based on this hybrid material selection, you might want to:</text:p>
      <text:list text:style-name="L8">
        <text:list-item>
          <text:p text:style-name="P34">Refine the engineering for the hybrid joints connecting the rigid bamboo spine to the flexible rattan cabin?</text:p>
        </text:list-item>
        <text:list-item>
          <text:p text:style-name="P34">Explore specific "solihiya" weaving patterns for the passenger seat to optimize durability and airflow?</text:p>
        </text:list-item>
        <text:list-item>
          <text:p text:style-name="P34">Find suppliers specializing in steam-bent Manau rattan for the canopy struts?</text:p>
        </text:list-item>
      </text:list>
      <text:p text:style-name="P21">finish view</text:p>
      <text:p text:style-name="P22">are there currently products like the zenith aero style made with bamboo and rattan?</text:p>
      <text:p text:style-name="P23">Show thought process</text:p>
      <text:list text:style-name="L9">
        <text:list-item>
          <text:p text:style-name="P35"><draw:frame draw:style-name="fr1" draw:name="Image16" text:anchor-type="as-char" svg:width="0.423cm" svg:height="0.423cm" draw:z-index="12"><draw:image xlink:href="Pictures/100000000000001C0000001CE06020A1.png" xlink:type="simple" xlink:show="embed" xlink:actuate="onLoad" draw:mime-type="image/png"/></draw:frame></text:p>
        </text:list-item>
        <text:list-item>
          <text:p text:style-name="P35"><draw:frame draw:style-name="fr1" draw:name="Image17" text:anchor-type="as-char" svg:width="0.423cm" svg:height="0.423cm" draw:z-index="13"><draw:image xlink:href="Pictures/1000000000000020000000205396F548.png" xlink:type="simple" xlink:show="embed" xlink:actuate="onLoad" draw:mime-type="image/png"/></draw:frame></text:p>
        </text:list-item>
        <text:list-item>
          <text:p text:style-name="P35"><draw:frame draw:style-name="fr1" draw:name="Image18" text:anchor-type="as-char" svg:width="0.423cm" svg:height="0.423cm" draw:z-index="14"><draw:image xlink:href="Pictures/100000000000001C0000001C72A03D18.png" xlink:type="simple" xlink:show="embed" xlink:actuate="onLoad" draw:mime-type="image/png"/></draw:frame></text:p>
        </text:list-item>
      </text:list>
      <text:p text:style-name="P25">27 sources</text:p>
      <text:p text:style-name="P6"><text:span text:style-name="T6">There is currently no mass-market product that matches the exact "Zenith Aero" aesthetic of aerodynamic laminated bamboo paired with a premium woven rattan cabin. Instead, the market consists of specialized industrial prototypes like the </text:span><text:span text:style-name="Strong_20_Emphasis"><text:span text:style-name="T7">Bamboo Bicycle Club</text:span></text:span><text:span text:style-name="T6"> cargo trike, custom heritage-style builds from social enterprises like </text:span><text:span text:style-name="Strong_20_Emphasis"><text:span text:style-name="T7">Bambike</text:span></text:span><text:span text:style-name="T6">, and vintage 1970s hybrid collectibles </text:span><text:a xlink:type="simple" xlink:href="https://newatlas.com/urban-transport/bamboo-pedal-assist-cargo-trike-prototype/?requestId=AI_Android_4500050031336_1769945375085" office:target-frame-name="_blank" xlink:show="new" text:style-name="Internet_20_link" text:visited-style-name="Visited_20_Internet_20_Link"><text:span text:style-name="Citation"><text:span text:style-name="T3">Newatlas</text:span></text:span></text:a><text:a xlink:type="simple" xlink:href="https://www.facebook.com/BAMBIKE/posts/heres-a-closer-look-at-the-bamboo-pedicab-that-got-quite-a-bit-of-attention-duri/949419587346369/?requestId=AI_Android_4500050031336_1769945375085" office:target-frame-name="_blank" xlink:show="new" text:style-name="Internet_20_link" text:visited-style-name="Visited_20_Internet_20_Link"><text:span text:style-name="Citation"><text:span text:style-name="T3">Facebook</text:span></text:span></text:a><text:a xlink:type="simple" xlink:href="https://www.1stdibs.com/furniture/more-furniture-collectibles/collectibles-curiosities/sports-equipment-memorabilia/bamboo-rattan-bicycle/id-f_14749021/?requestId=AI_Android_4500050031336_1769945375085" office:target-frame-name="_blank" xlink:show="new" text:style-name="Internet_20_link" text:visited-style-name="Visited_20_Internet_20_Link"><text:span text:style-name="Citation"><text:span text:style-name="T3">1Stdibs</text:span></text:span></text:a><text:span text:style-name="T6">.</text:span></text:p>
      <text:p text:style-name="P36">The following analysis details the commercial gap for high-performance laminated eco-vehicles and compares existing prototypes and bespoke models to the Zenith Aero concept.</text:p>
      <text:p text:style-name="P27"><draw:frame draw:style-name="fr1" draw:name="Image19" text:anchor-type="as-char" svg:width="0.609cm" svg:height="0.635cm" draw:z-index="15"><draw:image xlink:href="Pictures/1000000100000060000000605F65D74E.png" xlink:type="simple" xlink:show="embed" xlink:actuate="onLoad" draw:mime-type="image/png"/></draw:frame></text:p>
      <text:p text:style-name="P28"><text:soft-page-break/>Market Analysis: Commercial Availability Of Bamboo Rattan Pedicabs</text:p>
      <text:section text:style-name="Sect1" text:name="Section2">
        <text:h text:style-name="P4" text:outline-level="1"><text:bookmark text:name="anchor_undefined Copy 1"/>Market Analysis: Commercial Availability of Bamboo-Rattan Pedicabs</text:h>
        <text:p text:style-name="P6"><text:span text:style-name="T1">The "Zenith Aero" style—defined by aerodynamic, laminated bamboo frames and integrated rattan passenger cabins—represents a next-generation evolution in sustainable transport. Currently, while there is no mass-market "off-the-shelf" product that matches this exact high-performance aesthetic, several pioneering manufacturers and historical precedents exist within the niche of eco-mobility </text:span><text:a xlink:type="simple" xlink:href="https://newatlas.com/urban-transport/bamboo-pedal-assist-cargo-trike-prototype/?requestId=AI_Android_4500050031336_1769945375085" office:target-frame-name="_blank" xlink:show="new" text:style-name="Internet_20_link" text:visited-style-name="Visited_20_Internet_20_Link"><text:span text:style-name="Citation"><text:span text:style-name="T3">Newatlas</text:span></text:span></text:a><text:a xlink:type="simple" xlink:href="https://www.facebook.com/BAMBIKE/posts/heres-a-closer-look-at-the-bamboo-pedicab-that-got-quite-a-bit-of-attention-duri/949419587346369/?requestId=AI_Android_4500050031336_1769945375085" office:target-frame-name="_blank" xlink:show="new" text:style-name="Internet_20_link" text:visited-style-name="Visited_20_Internet_20_Link"><text:span text:style-name="Citation"><text:span text:style-name="T3">Facebook</text:span></text:span></text:a><text:span text:style-name="T1">.</text:span></text:p>
        <text:h text:style-name="P5" text:outline-level="2">1. Current Market Landscape</text:h>
        <text:p text:style-name="P29">The current market for bamboo and rattan three-wheelers is divided into three distinct segments: professional prototypes, bespoke social enterprises, and vintage collectibles.</text:p>
        <text:h text:style-name="P9" text:outline-level="3">A. Professional Prototypes &amp; DIY Kits</text:h>
        <text:p text:style-name="P6"><text:span text:style-name="T1">The most advanced contemporary equivalents are emerging from the </text:span><text:span text:style-name="Strong_20_Emphasis"><text:span text:style-name="T2">Bamboo Bicycle Club</text:span></text:span><text:span text:style-name="T1"> (UK). Their recent cargo e-trike prototype utilizes a bamboo frame capable of hauling </text:span><text:span text:style-name="Strong_20_Emphasis"><text:span text:style-name="T2">250 kg (550 lb)</text:span></text:span><text:span text:style-name="T1">. While it focuses on utility rather than the "Luxe Aero" aesthetic, it shares the technical DNA of high-capacity sustainable frames. They intend to launch this as a DIY home-build kit in the near future </text:span><text:a xlink:type="simple" xlink:href="https://newatlas.com/urban-transport/bamboo-pedal-assist-cargo-trike-prototype/?requestId=AI_Android_4500050031336_1769945375085" office:target-frame-name="_blank" xlink:show="new" text:style-name="Internet_20_link" text:visited-style-name="Visited_20_Internet_20_Link"><text:span text:style-name="Citation"><text:span text:style-name="T3">Newatlas</text:span></text:span></text:a><text:a xlink:type="simple" xlink:href="https://bamboobicycleclub.org/blogs/news/revolutionizing-e-bike-cargo-frames-our-journey-from-design-challenge-to-sustainable-innovation?requestId=AI_Android_4500050031336_1769945375085" office:target-frame-name="_blank" xlink:show="new" text:style-name="Internet_20_link" text:visited-style-name="Visited_20_Internet_20_Link"><text:span text:style-name="Citation"><text:span text:style-name="T3">Bamboobicycleclub</text:span></text:span></text:a><text:span text:style-name="T1">.</text:span></text:p>
        <text:h text:style-name="P9" text:outline-level="3">B. Bespoke Social Enterprises</text:h>
        <text:p text:style-name="P6"><text:span text:style-name="Strong_20_Emphasis"><text:span text:style-name="T2">Bambike</text:span></text:span><text:span text:style-name="T1"> (Philippines) is a leading name in functional bamboo cycles. They have produced customized bamboo pedicabs, such as the "Victoria" series, which features motor integration and hand-crafted bamboo frames </text:span><text:a xlink:type="simple" xlink:href="https://www.instagram.com/p/DGhH3V0Tf2R/?requestId=AI_Android_4500050031336_1769945375085" office:target-frame-name="_blank" xlink:show="new" text:style-name="Internet_20_link" text:visited-style-name="Visited_20_Internet_20_Link"><text:span text:style-name="Citation"><text:span text:style-name="T3">Instagram</text:span></text:span></text:a><text:a xlink:type="simple" xlink:href="https://www.facebook.com/BAMBIKE/posts/heres-a-closer-look-at-the-bamboo-pedicab-that-got-quite-a-bit-of-attention-duri/949419587346369/?requestId=AI_Android_4500050031336_1769945375085" office:target-frame-name="_blank" xlink:show="new" text:style-name="Internet_20_link" text:visited-style-name="Visited_20_Internet_20_Link"><text:span text:style-name="Citation"><text:span text:style-name="T3">Facebook</text:span></text:span></text:a><text:span text:style-name="T1">. Their designs are functional and commercially available via custom order, though they typically lean toward a "heritage/rugged" aesthetic rather than the "laminated aero" look.</text:span></text:p>
        <text:h text:style-name="P9" text:outline-level="3">C. Heritage Hybrid Collectibles</text:h>
        <text:p text:style-name="P6"><text:span text:style-name="T1">Interestingly, the specific "Bamboo-Rattan Hybrid" logic was popular in the 1970s for boutique leisure vehicles. These vintage pieces often featured full bamboo frames with intricate rattan </text:span><text:soft-page-break/><text:span text:style-name="T1">weaving for the seats and accents </text:span><text:a xlink:type="simple" xlink:href="https://www.1stdibs.com/furniture/more-furniture-collectibles/collectibles-curiosities/sports-equipment-memorabilia/bamboo-rattan-bicycle/id-f_14749021/?requestId=AI_Android_4500050031336_1769945375085" office:target-frame-name="_blank" xlink:show="new" text:style-name="Internet_20_link" text:visited-style-name="Visited_20_Internet_20_Link"><text:span text:style-name="Citation"><text:span text:style-name="T4">1Stdibs</text:span></text:span></text:a><text:span text:style-name="T1">. While functional at the time, these are now primarily found as high-value collectibles or decorative art pieces </text:span><text:a xlink:type="simple" xlink:href="https://circawho.com/product/boho-chic-rattan-and-bamboo-bicycle/?requestId=AI_Android_4500050031336_1769945375085" office:target-frame-name="_blank" xlink:show="new" text:style-name="Internet_20_link" text:visited-style-name="Visited_20_Internet_20_Link"><text:span text:style-name="Citation"><text:span text:style-name="T4">Circawho</text:span></text:span></text:a><text:span text:style-name="T1">.</text:span></text:p>
        <text:p text:style-name="P7"/>
        <text:h text:style-name="P5" text:outline-level="2">2. Competitive Comparison: Existing Models vs. Zenith Aero Concept</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4">Product/Concept</text:p>
              </table:table-cell>
              <table:table-cell table:style-name="Table3.A1" office:value-type="string">
                <text:p text:style-name="P14">Primary Material</text:p>
              </table:table-cell>
              <table:table-cell table:style-name="Table3.A1" office:value-type="string">
                <text:p text:style-name="P14">Commercial Status</text:p>
              </table:table-cell>
              <table:table-cell table:style-name="Table3.A1" office:value-type="string">
                <text:p text:style-name="P14">Key Differentiator</text:p>
              </table:table-cell>
            </table:table-row>
          </table:table-header-rows>
          <table:table-row>
            <table:table-cell table:style-name="Table3.A2" office:value-type="string">
              <text:p text:style-name="P15"><text:span text:style-name="Strong_20_Emphasis"><text:span text:style-name="T5">Bamboo Bicycle Club Trike</text:span></text:span></text:p>
            </table:table-cell>
            <table:table-cell table:style-name="Table3.B2" office:value-type="string">
              <text:p text:style-name="P15">Guadua Bamboo</text:p>
            </table:table-cell>
            <table:table-cell table:style-name="Table3.C2" office:value-type="string">
              <text:p text:style-name="P30">Working Prototype <text:a xlink:type="simple" xlink:href="https://newatlas.com/urban-transport/bamboo-pedal-assist-cargo-trike-prototype/?requestId=AI_Android_4500050031336_1769945375085" office:target-frame-name="_blank" xlink:show="new" text:style-name="Internet_20_link" text:visited-style-name="Visited_20_Internet_20_Link"><text:span text:style-name="Citation"><text:span text:style-name="T8">Newatlas</text:span></text:span></text:a></text:p>
            </table:table-cell>
            <table:table-cell table:style-name="Table3.D2" office:value-type="string">
              <text:p text:style-name="P15">Heavy cargo utility (250kg)</text:p>
            </table:table-cell>
          </table:table-row>
          <table:table-row>
            <table:table-cell table:style-name="Table3.A3" office:value-type="string">
              <text:p text:style-name="P15"><text:span text:style-name="Strong_20_Emphasis"><text:span text:style-name="T5">Bambike Pedicab</text:span></text:span></text:p>
            </table:table-cell>
            <table:table-cell table:style-name="Table3.B3" office:value-type="string">
              <text:p text:style-name="P15">Raw Bamboo Poles</text:p>
            </table:table-cell>
            <table:table-cell table:style-name="Table3.C3" office:value-type="string">
              <text:p text:style-name="P30">Custom Order <text:a xlink:type="simple" xlink:href="https://www.facebook.com/BAMBIKE/posts/heres-a-closer-look-at-the-bamboo-pedicab-that-got-quite-a-bit-of-attention-duri/949419587346369/?requestId=AI_Android_4500050031336_1769945375085" office:target-frame-name="_blank" xlink:show="new" text:style-name="Internet_20_link" text:visited-style-name="Visited_20_Internet_20_Link"><text:span text:style-name="Citation"><text:span text:style-name="T8">Facebook</text:span></text:span></text:a></text:p>
            </table:table-cell>
            <table:table-cell table:style-name="Table3.D3" office:value-type="string">
              <text:p text:style-name="P15">Social enterprise; rugged build</text:p>
            </table:table-cell>
          </table:table-row>
          <table:table-row>
            <table:table-cell table:style-name="Table3.A4" office:value-type="string">
              <text:p text:style-name="P15"><text:span text:style-name="Strong_20_Emphasis"><text:span text:style-name="T5">Bamboo Treecycle</text:span></text:span></text:p>
            </table:table-cell>
            <table:table-cell table:style-name="Table3.B4" office:value-type="string">
              <text:p text:style-name="P30">Bamboo/Aluminum <text:a xlink:type="simple" xlink:href="https://www.guaduabamboo.com/blog/electric-powered-bamboo-tricycle?requestId=AI_Android_4500050031336_1769945375085" office:target-frame-name="_blank" xlink:show="new" text:style-name="Internet_20_link" text:visited-style-name="Visited_20_Internet_20_Link"><text:span text:style-name="Citation"><text:span text:style-name="T8">Guaduabamboo</text:span></text:span></text:a></text:p>
            </table:table-cell>
            <table:table-cell table:style-name="Table3.C4" office:value-type="string">
              <text:p text:style-name="P15">Concept/Prototype</text:p>
            </table:table-cell>
            <table:table-cell table:style-name="Table3.D4" office:value-type="string">
              <text:p text:style-name="P15">Large canopy; seats 3 people</text:p>
            </table:table-cell>
          </table:table-row>
          <table:table-row>
            <table:table-cell table:style-name="Table3.A5" office:value-type="string">
              <text:p text:style-name="P15"><text:span text:style-name="Strong_20_Emphasis"><text:span text:style-name="T5">1970s Hybrid Bike</text:span></text:span></text:p>
            </table:table-cell>
            <table:table-cell table:style-name="Table3.B5" office:value-type="string">
              <text:p text:style-name="P15">Bamboo &amp; Rattan</text:p>
            </table:table-cell>
            <table:table-cell table:style-name="Table3.C5" office:value-type="string">
              <text:p text:style-name="P30">Collectible <text:a xlink:type="simple" xlink:href="https://www.1stdibs.com/furniture/more-furniture-collectibles/collectibles-curiosities/sports-equipment-memorabilia/bamboo-rattan-bicycle/id-f_14749021/?requestId=AI_Android_4500050031336_1769945375085" office:target-frame-name="_blank" xlink:show="new" text:style-name="Internet_20_link" text:visited-style-name="Visited_20_Internet_20_Link"><text:span text:style-name="Citation"><text:span text:style-name="T8">1Stdibs</text:span></text:span></text:a></text:p>
            </table:table-cell>
            <table:table-cell table:style-name="Table3.D5" office:value-type="string">
              <text:p text:style-name="P15">Intricate "Boho Chic" weaving</text:p>
            </table:table-cell>
          </table:table-row>
          <table:table-row>
            <table:table-cell table:style-name="Table3.A6" office:value-type="string">
              <text:p text:style-name="P15"><text:span text:style-name="Strong_20_Emphasis"><text:span text:style-name="T5">Zenith Aero (Our Design)</text:span></text:span></text:p>
            </table:table-cell>
            <table:table-cell table:style-name="Table3.B6" office:value-type="string">
              <text:p text:style-name="P15"><text:span text:style-name="Strong_20_Emphasis"><text:span text:style-name="T5">Laminated Bamboo</text:span></text:span></text:p>
            </table:table-cell>
            <table:table-cell table:style-name="Table3.C6" office:value-type="string">
              <text:p text:style-name="P15"><text:span text:style-name="Strong_20_Emphasis"><text:span text:style-name="T5">Conceptual Project</text:span></text:span></text:p>
            </table:table-cell>
            <table:table-cell table:style-name="Table3.D6" office:value-type="string">
              <text:p text:style-name="P15"><text:span text:style-name="Strong_20_Emphasis"><text:span text:style-name="T5">Aerodynamic; Luxe Aesthetic</text:span></text:span></text:p>
            </table:table-cell>
          </table:table-row>
        </table:table>
        <text:p text:style-name="P7"/>
        <text:h text:style-name="P5" text:outline-level="2">3. Commercial Reference Examples</text:h>
        <text:p text:style-name="P29">While the full-sized "Zenith Aero" is a unique design, the following products illustrate the current availability of bamboo/rattan transport and decorative counterparts in the B2B and consumer markets.</text:p>
        <text:h text:style-name="P9" text:outline-level="3">Functional &amp; Decorative Benchmarks</text:h>
        <text:p text:style-name="P37"><text:span text:style-name="T1">The products below represent the current commercial spectrum, from standard metal rickshaws with rattan accents to decorative bamboo miniatures.</text:span></text:p>
        <text:h text:style-name="P5" text:outline-level="2"><text:soft-page-break/>4. Analysis &amp; Strategic Conclusion</text:h>
        <text:h text:style-name="P9" text:outline-level="3">Gap in the Market</text:h>
        <text:p text:style-name="P10"><text:span text:style-name="T1">There is currently a clear </text:span><text:span text:style-name="Strong_20_Emphasis"><text:span text:style-name="T2">market vacancy</text:span></text:span><text:span text:style-name="T1"> for a high-end, aerodynamic pedicab that utilizes </text:span><text:span text:style-name="Strong_20_Emphasis"><text:span text:style-name="T2">laminated bamboo</text:span></text:span><text:span text:style-name="T1"> (rather than raw poles). Current commercial products are either:</text:span></text:p>
        <text:list text:style-name="L10">
          <text:list-item>
            <text:p text:style-name="P38"><text:span text:style-name="Strong_20_Emphasis"><text:span text:style-name="T2">Industrial/DIY</text:span></text:span><text:span text:style-name="T1">: High utility but lacking luxury finish </text:span><text:a xlink:type="simple" xlink:href="https://newatlas.com/urban-transport/bamboo-pedal-assist-cargo-trike-prototype/?requestId=AI_Android_4500050031336_1769945375085" office:target-frame-name="_blank" xlink:show="new" text:style-name="Internet_20_link" text:visited-style-name="Visited_20_Internet_20_Link"><text:span text:style-name="Citation"><text:span text:style-name="T4">Newatlas</text:span></text:span></text:a><text:span text:style-name="T1">.</text:span></text:p>
          </text:list-item>
          <text:list-item>
            <text:p text:style-name="P38"><text:span text:style-name="Strong_20_Emphasis"><text:span text:style-name="T2">Decorative</text:span></text:span><text:span text:style-name="T1">: Small-scale rattan trikes intended for display rather than transport </text:span><text:a xlink:type="simple" xlink:href="https://www.alibaba.com/product-detail/Bamboo-Handmade-Mini-Tricycle-Art-Craft_1600993019126.html?requestId=AI_Android_4500050031336_1769945375085" office:target-frame-name="_blank" xlink:show="new" text:style-name="Internet_20_link" text:visited-style-name="Visited_20_Internet_20_Link"><text:span text:style-name="Citation"><text:span text:style-name="T4">Alibaba</text:span></text:span></text:a><text:span text:style-name="T1">.</text:span></text:p>
          </text:list-item>
          <text:list-item>
            <text:p text:style-name="P38"><text:span text:style-name="Strong_20_Emphasis"><text:span text:style-name="T2">Vintage</text:span></text:span><text:span text:style-name="T1">: High aesthetic value but lacking modern safety and drivetrain technology </text:span><text:a xlink:type="simple" xlink:href="https://circawho.com/product/boho-chic-rattan-and-bamboo-bicycle/?requestId=AI_Android_4500050031336_1769945375085" office:target-frame-name="_blank" xlink:show="new" text:style-name="Internet_20_link" text:visited-style-name="Visited_20_Internet_20_Link"><text:span text:style-name="Citation"><text:span text:style-name="T4">Circawho</text:span></text:span></text:a><text:span text:style-name="T1">.</text:span></text:p>
          </text:list-item>
        </text:list>
        <text:h text:style-name="P9" text:outline-level="3">Feasibility for Production</text:h>
        <text:p text:style-name="P6"><text:span text:style-name="T1">The "Zenith Aero" is technically feasible but would require a manufacturer specializing in </text:span><text:span text:style-name="Strong_20_Emphasis"><text:span text:style-name="T2">high-precision lamination</text:span></text:span><text:span text:style-name="T1"> (similar to premium flooring or furniture) rather than traditional bicycle frame builders </text:span><text:a xlink:type="simple" xlink:href="https://craftsmanship.net/what-a-bamboo-bicycle/?requestId=AI_Android_4500050031336_1769945375085" office:target-frame-name="_blank" xlink:show="new" text:style-name="Internet_20_link" text:visited-style-name="Visited_20_Internet_20_Link"><text:span text:style-name="Citation"><text:span text:style-name="T4">Craftsmanship</text:span></text:span></text:a><text:span text:style-name="T1">. Leveraging the 15% growth in the bamboo bicycle component market, a commercial launch of the Zenith Aero would likely succeed as a </text:span><text:span text:style-name="Strong_20_Emphasis"><text:span text:style-name="T2">boutique resort vehicle</text:span></text:span><text:span text:style-name="T1"> or a </text:span><text:span text:style-name="Strong_20_Emphasis"><text:span text:style-name="T2">premium urban tourism flagship</text:span></text:span><text:span text:style-name="T1"> </text:span><text:a xlink:type="simple" xlink:href="https://www.futuredatastats.com/bamboo-bicycle-components-market?requestId=AI_Android_4500050031336_1769945375085&amp;srsltid=AfmBOop9od8V-a916T20nBShDkiLEGiuxFrC2PGtvPbECrFyUl-Fxz_r" office:target-frame-name="_blank" xlink:show="new" text:style-name="Internet_20_link" text:visited-style-name="Visited_20_Internet_20_Link"><text:span text:style-name="Citation"><text:span text:style-name="T4">Futuredatastats</text:span></text:span></text:a><text:span text:style-name="T1">.</text:span></text:p>
        <text:p text:style-name="P7"/>
        <text:h text:style-name="P5" text:outline-level="2">Next Steps</text:h>
        <text:p text:style-name="P29">To transition the Zenith Aero from a design concept to a commercial reality, I can assist with:</text:p>
        <text:list text:style-name="L11">
          <text:list-item>
            <text:p text:style-name="P39"><text:span text:style-name="Strong_20_Emphasis"><text:span text:style-name="T2">Manufacturer Sourcing</text:span></text:span><text:span text:style-name="T1">: Identifying laminated bamboo specialists in regions like Southeast Asia or Europe who can execute the Aero frame </text:span><text:a xlink:type="simple" xlink:href="https://boogaalibikes.com/?requestId=AI_Android_4500050031336_1769945375085" office:target-frame-name="_blank" xlink:show="new" text:style-name="Internet_20_link" text:visited-style-name="Visited_20_Internet_20_Link"><text:span text:style-name="Citation"><text:span text:style-name="T4">Boogaalibikes</text:span></text:span></text:a><text:span text:style-name="T1">.</text:span></text:p>
          </text:list-item>
          <text:list-item>
            <text:p text:style-name="P39"><text:span text:style-name="Strong_20_Emphasis"><text:span text:style-name="T2">Regulatory Analysis</text:span></text:span><text:span text:style-name="T1">: Ensuring the 3-person configuration meets international pedicab safety and dimension standards </text:span><text:a xlink:type="simple" xlink:href="https://austinpedicab.org/austin-pedicab-safety-meeting-nov-20-2008/?requestId=AI_Android_4500050031336_1769945375085" office:target-frame-name="_blank" xlink:show="new" text:style-name="Internet_20_link" text:visited-style-name="Visited_20_Internet_20_Link"><text:span text:style-name="Citation"><text:span text:style-name="T4">Austinpedicab</text:span></text:span></text:a><text:span text:style-name="T1">.</text:span></text:p>
          </text:list-item>
          <text:list-item>
            <text:p text:style-name="P40"><text:span text:style-name="Strong_20_Emphasis"><text:span text:style-name="T2">Cost Breakdown</text:span></text:span><text:span text:style-name="T1">: Developing a comprehensive Bill of Materials (BOM) including the rattan weaving costs and cloth canopy sourcing.</text:span></text:p>
          </text:list-item>
        </text:list>
        <text:p text:style-name="P10"><text:span text:style-name="T9">📁 </text:span><text:span text:style-name="Strong_20_Emphasis"><text:span text:style-name="T2">Report saved to:</text:span></text:span><text:span text:style-name="T1"> </text:span><text:span text:style-name="T10">/home/wuying/accio/round-7/reports/Market_Analysis:_Commercial_Availability_of_Bamboo-Rattan_Pedicabs.md</text:span><text:span text:style-name="T1">(reference ID: turn7file1)</text:span></text:p>
        <text:p text:style-name="P18">finish view</text:p>
      </text:section>
      <text:p text:style-name="P19">As you consider moving this design from a concept to a commercial project, you might want to:</text:p>
      <text:list text:style-name="L12">
        <text:list-item>
          <text:p text:style-name="P41"><text:soft-page-break/>Identify manufacturers specializing in high-precision laminated bamboo structures?</text:p>
        </text:list-item>
        <text:list-item>
          <text:p text:style-name="P41">Review international safety and dimension standards for 3-person pedicabs?</text:p>
        </text:list-item>
        <text:list-item>
          <text:p text:style-name="P41">Develop a detailed cost breakdown for the hybrid rattan weaving and canopy sourcing?</text:p>
        </text:list-item>
      </text:list>
      <text:p text:style-name="P21">finish view</text:p>
      <text:p text:style-name="P22">do you know if there are local artists or manufacturers of laminate bamboo or rattan steam bending (Vancouver)?</text:p>
      <text:p text:style-name="P23">Show thought process</text:p>
      <text:list text:style-name="L13">
        <text:list-item>
          <text:p text:style-name="P42"><draw:frame draw:style-name="fr1" draw:name="Image24" text:anchor-type="as-char" svg:width="0.423cm" svg:height="0.423cm" draw:z-index="18"><draw:image xlink:href="Pictures/100000010000001C0000001C14A72F67.png" xlink:type="simple" xlink:show="embed" xlink:actuate="onLoad" draw:mime-type="image/png"/></draw:frame></text:p>
        </text:list-item>
        <text:list-item>
          <text:p text:style-name="P42"><draw:frame draw:style-name="fr1" draw:name="Image25" text:anchor-type="as-char" svg:width="0.423cm" svg:height="0.423cm" draw:z-index="19"><draw:image xlink:href="Pictures/100000000000001C0000001C6C7B8303.png" xlink:type="simple" xlink:show="embed" xlink:actuate="onLoad" draw:mime-type="image/png"/></draw:frame></text:p>
        </text:list-item>
        <text:list-item>
          <text:p text:style-name="P42"><draw:frame draw:style-name="fr1" draw:name="Image26" text:anchor-type="as-char" svg:width="0.423cm" svg:height="0.423cm" draw:z-index="20"><draw:image xlink:href="Pictures/100000010000001C0000001C838AA043.png" xlink:type="simple" xlink:show="embed" xlink:actuate="onLoad" draw:mime-type="image/png"/></draw:frame></text:p>
        </text:list-item>
      </text:list>
      <text:p text:style-name="P25">57 sources</text:p>
      <text:p text:style-name="P6"><text:span text:style-name="T6">Vancouver hosts a specialized ecosystem of artisans and technical experts capable of executing your bamboo and rattan pedicab project. While few shops focus exclusively on vehicle frames, the city's custom bicycle builders, heritage furniture restorers, and university researchers provide the specific skills needed for structural lamination and steam bending </text:span><text:a xlink:type="simple" xlink:href="https://grassframes.ca/?requestId=AI_Android_4500050031336_1769945583256" office:target-frame-name="_blank" xlink:show="new" text:style-name="Internet_20_link" text:visited-style-name="Visited_20_Internet_20_Link"><text:span text:style-name="Citation"><text:span text:style-name="T3">Grassframes</text:span></text:span></text:a><text:a xlink:type="simple" xlink:href="https://www.yellowpages.ca/bus/British-Columbia/North-Vancouver/A-A-Furniture-Repair-Refinishing/7422602.html?requestId=AI_Android_4500050031336_1769945583256" office:target-frame-name="_blank" xlink:show="new" text:style-name="Internet_20_link" text:visited-style-name="Visited_20_Internet_20_Link"><text:span text:style-name="Citation"><text:span text:style-name="T3">Yellowpages</text:span></text:span></text:a><text:span text:style-name="T6">.</text:span></text:p>
      <text:h text:style-name="P43" text:outline-level="3">Key Local Specialists</text:h>
      <text:list text:style-name="L14">
        <text:list-item>
          <text:p text:style-name="P44"><text:span text:style-name="Strong_20_Emphasis"><text:span text:style-name="T7">Structural Bamboo Fabrication</text:span></text:span><text:span text:style-name="T6">: </text:span><text:span text:style-name="Strong_20_Emphasis"><text:span text:style-name="T7">Grass Frames</text:span></text:span><text:span text:style-name="T6"> (Al Roback) is the primary local expert for "Nature's Carbon Fiber." With over </text:span><text:span text:style-name="Strong_20_Emphasis"><text:span text:style-name="T7">10 years</text:span></text:span><text:span text:style-name="T6"> of experience in Vancouver, they specialize in hand-crafted bamboo bicycle frames and are uniquely equipped to handle the structural "spine" of your trike </text:span><text:a xlink:type="simple" xlink:href="https://grassframes.ca/?requestId=AI_Android_4500050031336_1769945583256" office:target-frame-name="_blank" xlink:show="new" text:style-name="Internet_20_link" text:visited-style-name="Visited_20_Internet_20_Link"><text:span text:style-name="Citation"><text:span text:style-name="T3">Grassframes</text:span></text:span></text:a><text:a xlink:type="simple" xlink:href="https://www.vancouverisawesome.com/courier-archive/living/grass-frame-bamboo-bikes-cool-with-a-conscience-2971292?requestId=AI_Android_4500050031336_1769945583256" office:target-frame-name="_blank" xlink:show="new" text:style-name="Internet_20_link" text:visited-style-name="Visited_20_Internet_20_Link"><text:span text:style-name="Citation"><text:span text:style-name="T3">Vancouverisawesome</text:span></text:span></text:a><text:span text:style-name="T6">.</text:span></text:p>
        </text:list-item>
        <text:list-item>
          <text:p text:style-name="P44"><text:span text:style-name="Strong_20_Emphasis"><text:span text:style-name="T7">Rattan Steam Bending</text:span></text:span><text:span text:style-name="T6">: </text:span><text:span text:style-name="Strong_20_Emphasis"><text:span text:style-name="T7">A A Furniture Repair &amp; Refinishing</text:span></text:span><text:span text:style-name="T6"> in North Vancouver specializes in heritage furniture, specifically </text:span><text:span text:style-name="Strong_20_Emphasis"><text:span text:style-name="T7">caning and rattan steam-bending</text:span></text:span><text:span text:style-name="T6">. They possess the traditional tools and knowledge required to shape the organic curves of the passenger cabin and canopy struts </text:span><text:a xlink:type="simple" xlink:href="https://www.yellowpages.ca/bus/British-Columbia/North-Vancouver/A-A-Furniture-Repair-Refinishing/7422602.html?requestId=AI_Android_4500050031336_1769945583256" office:target-frame-name="_blank" xlink:show="new" text:style-name="Internet_20_link" text:visited-style-name="Visited_20_Internet_20_Link"><text:span text:style-name="Citation"><text:span text:style-name="T3">Yellowpages</text:span></text:span></text:a><text:a xlink:type="simple" xlink:href="https://www.aafurniturerepair.ca/?requestId=AI_Android_4500050031336_1769945583256" office:target-frame-name="_blank" xlink:show="new" text:style-name="Internet_20_link" text:visited-style-name="Visited_20_Internet_20_Link"><text:span text:style-name="Citation"><text:span text:style-name="T3">Aafurniturerepair</text:span></text:span></text:a><text:span text:style-name="T6">.</text:span></text:p>
        </text:list-item>
        <text:list-item>
          <text:p text:style-name="P44"><text:span text:style-name="Strong_20_Emphasis"><text:span text:style-name="T7">Material Supply &amp; History</text:span></text:span><text:span text:style-name="T6">: </text:span><text:span text:style-name="Strong_20_Emphasis"><text:span text:style-name="T7">Coolite Bamboo Products</text:span></text:span><text:span text:style-name="T6"> has been a specialist in the direct import and manufacturing of bamboo and rattan in Vancouver for </text:span><text:span text:style-name="Strong_20_Emphasis"><text:span text:style-name="T7">over 60 years</text:span></text:span><text:span text:style-name="T6">, making them a vital local source for raw Manau rattan and high-quality poles </text:span><text:a xlink:type="simple" xlink:href="https://coolitebamboo.com/?requestId=AI_Android_4500050031336_1769945583256" office:target-frame-name="_blank" xlink:show="new" text:style-name="Internet_20_link" text:visited-style-name="Visited_20_Internet_20_Link"><text:span text:style-name="Citation"><text:span text:style-name="T3">Coolitebamboo</text:span></text:span></text:a><text:a xlink:type="simple" xlink:href="https://www.cylex-canada.ca/vancouver/rattan%20furniture.html?requestId=AI_Android_4500050031336_1769945583256" office:target-frame-name="_blank" xlink:show="new" text:style-name="Internet_20_link" text:visited-style-name="Visited_20_Internet_20_Link"><text:span text:style-name="Citation"><text:span text:style-name="T3">Cylex-Canada</text:span></text:span></text:a><text:span text:style-name="T6">.</text:span></text:p>
        </text:list-item>
        <text:list-item>
          <text:p text:style-name="P44"><text:span text:style-name="Strong_20_Emphasis"><text:span text:style-name="T7">Lamination Science</text:span></text:span><text:span text:style-name="T6">: The </text:span><text:span text:style-name="Strong_20_Emphasis"><text:span text:style-name="T7">UBC Bamboo Applications and Management Group</text:span></text:span><text:span text:style-name="T6"> (led by Dr. Chunping Dai) conducts advanced research into bamboo composites and lamination techniques, offering a technical resource for ensuring the "Zenith Aero" frame meets commercial safety standards </text:span><text:a xlink:type="simple" xlink:href="https://bamboo.forestry.ubc.ca/?requestId=AI_Android_4500050031336_1769945583256" office:target-frame-name="_blank" xlink:show="new" text:style-name="Internet_20_link" text:visited-style-name="Visited_20_Internet_20_Link"><text:span text:style-name="Citation"><text:span text:style-name="T4">Ubc</text:span></text:span></text:a><text:span text:style-name="T6">.</text:span></text:p>
        </text:list-item>
      </text:list>
      <text:h text:style-name="P43" text:outline-level="3"><text:soft-page-break/>Prototyping &amp; Maker Spaces</text:h>
      <text:p text:style-name="P6"><text:span text:style-name="T6">If you intend to lead the fabrication or develop a prototype locally, </text:span><text:span text:style-name="Strong_20_Emphasis"><text:span text:style-name="T7">MakerLabs</text:span></text:span><text:span text:style-name="T6"> (East Vancouver) and the </text:span><text:span text:style-name="Strong_20_Emphasis"><text:span text:style-name="T7">Vancouver Community Laboratory (CoLab)</text:span></text:span><text:span text:style-name="T6"> provide the necessary industrial tools, including large-scale CNC routers and steam-bending workshops </text:span><text:a xlink:type="simple" xlink:href="https://www.makerlabs.com/?requestId=AI_Android_4500050031336_1769945583256" office:target-frame-name="_blank" xlink:show="new" text:style-name="Internet_20_link" text:visited-style-name="Visited_20_Internet_20_Link"><text:span text:style-name="Citation"><text:span text:style-name="T3">Makerlabs</text:span></text:span></text:a><text:a xlink:type="simple" xlink:href="https://vancommunitylab.com/?requestId=AI_Android_4500050031336_1769945583256" office:target-frame-name="_blank" xlink:show="new" text:style-name="Internet_20_link" text:visited-style-name="Visited_20_Internet_20_Link"><text:span text:style-name="Citation"><text:span text:style-name="T3">Vancommunitylab</text:span></text:span></text:a><text:span text:style-name="T6">.</text:span></text:p>
      <text:p text:style-name="P36">The directory below provides specific contact information, specializations, and service summaries for these local experts to help you begin your outreach.</text:p>
      <text:p text:style-name="P27"><draw:frame draw:style-name="fr1" draw:name="Image27" text:anchor-type="as-char" svg:width="0.609cm" svg:height="0.635cm" draw:z-index="21"><draw:image xlink:href="Pictures/1000000100000060000000605F65D74E.png" xlink:type="simple" xlink:show="embed" xlink:actuate="onLoad" draw:mime-type="image/png"/></draw:frame></text:p>
      <text:p text:style-name="P28">Directory: Bamboo And Rattan Specialists In Vancouver Bc</text:p>
      <text:section text:style-name="Sect1" text:name="Section3">
        <text:h text:style-name="P4" text:outline-level="1"><text:bookmark text:name="anchor_undefined Copy 2"/>Directory: Bamboo and Rattan Specialists in Vancouver, BC</text:h>
        <text:p text:style-name="P29">Vancouver hosts a specialized ecosystem of artisans and technical experts capable of working with bamboo and rattan. While few shops focus exclusively on "laminated bamboo vehicle frames," the city’s custom bicycle builders, furniture restorers, and university researchers provide the necessary skills for such a project.</text:p>
        <text:p text:style-name="P7"/>
        <text:h text:style-name="P5" text:outline-level="2">1. Custom Vehicle &amp; Frame Specialists</text:h>
        <text:p text:style-name="P10"><text:span text:style-name="T1">For a project like the </text:span><text:span text:style-name="Strong_20_Emphasis"><text:span text:style-name="T2">Zenith Aero</text:span></text:span><text:span text:style-name="T1">, these specialists are the most direct local contacts for integrating bamboo into a structural transportation frame.</text:span></text:p>
        <text:list text:style-name="L15">
          <text:list-item>
            <text:p text:style-name="P45"><text:span text:style-name="Strong_20_Emphasis"><text:span text:style-name="T2">Grass Frames (Vancouver, BC)</text:span></text:span></text:p>
            <text:list>
              <text:list-item>
                <text:p text:style-name="P45"><text:span text:style-name="Strong_20_Emphasis"><text:span text:style-name="T2">Specialty</text:span></text:span><text:span text:style-name="T1">: Hand-crafted bamboo bicycle frames and full bamboo cycles.</text:span></text:p>
              </text:list-item>
              <text:list-item>
                <text:p text:style-name="P46"><text:span text:style-name="Strong_20_Emphasis"><text:span text:style-name="T2">Capability</text:span></text:span><text:span text:style-name="T1">: Led by Al Roback, this shop has over a decade of experience in selecting bamboo varieties and engineering structural joints for cycles. They are the primary local resource for "Nature's Carbon Fiber" fabrication </text:span><text:a xlink:type="simple" xlink:href="https://grassframes.ca/?requestId=AI_Android_4500050031336_1769945583256" office:target-frame-name="_blank" xlink:show="new" text:style-name="Internet_20_link" text:visited-style-name="Visited_20_Internet_20_Link"><text:span text:style-name="Citation"><text:span text:style-name="T3">Grassframes</text:span></text:span></text:a><text:a xlink:type="simple" xlink:href="https://www.vancouverisawesome.com/courier-archive/living/grass-frame-bamboo-bikes-cool-with-a-conscience-2971292?requestId=AI_Android_4500050031336_1769945583256" office:target-frame-name="_blank" xlink:show="new" text:style-name="Internet_20_link" text:visited-style-name="Visited_20_Internet_20_Link"><text:span text:style-name="Citation"><text:span text:style-name="T3">Vancouverisawesome</text:span></text:span></text:a><text:span text:style-name="T1">.</text:span></text:p>
              </text:list-item>
            </text:list>
          </text:list-item>
          <text:list-item>
            <text:p text:style-name="P45"><text:span text:style-name="Strong_20_Emphasis"><text:span text:style-name="T2">Bentwood Custom Woodworking (Squamish/Vancouver Area)</text:span></text:span></text:p>
            <text:list>
              <text:list-item>
                <text:p text:style-name="P45"><text:span text:style-name="Strong_20_Emphasis"><text:span text:style-name="T2">Specialty</text:span></text:span><text:span text:style-name="T1">: High-end custom bentwood and architectural woodworking.</text:span></text:p>
              </text:list-item>
              <text:list-item>
                <text:p text:style-name="P46"><text:span text:style-name="Strong_20_Emphasis"><text:span text:style-name="T2">Capability</text:span></text:span><text:span text:style-name="T1">: While primarily focused on wood, their expertise in complex bending and lamination transitions well to high-precision structural bamboo projects </text:span><text:a xlink:type="simple" xlink:href="https://www.houzz.com/professionals/woodworkers-and-carpenters/bentwood-custom-woodworking-pfvwus-pf~596954102?requestId=AI_Android_4500050031336_1769945583256" office:target-frame-name="_blank" xlink:show="new" text:style-name="Internet_20_link" text:visited-style-name="Visited_20_Internet_20_Link"><text:span text:style-name="Citation"><text:span text:style-name="T4">Houzz</text:span></text:span></text:a><text:span text:style-name="T1">.</text:span></text:p>
              </text:list-item>
            </text:list>
          </text:list-item>
        </text:list>
        <text:p text:style-name="P7"/>
        <text:h text:style-name="P5" text:outline-level="2"><text:soft-page-break/>2. Rattan Artisans &amp; Steam Bending Experts</text:h>
        <text:p text:style-name="P29">Rattan requires specific steam-bending skills that are often preserved by high-end furniture restoration specialists.</text:p>
        <text:list text:style-name="L16">
          <text:list-item>
            <text:p text:style-name="P47"><text:span text:style-name="Strong_20_Emphasis"><text:span text:style-name="T2">A A Furniture Repair &amp; Refinishing (North Vancouver)</text:span></text:span></text:p>
            <text:list>
              <text:list-item>
                <text:p text:style-name="P47"><text:span text:style-name="Strong_20_Emphasis"><text:span text:style-name="T2">Specialty</text:span></text:span><text:span text:style-name="T1">: Specialized in "Caning," Rattan, Wicker, and Bamboo repair.</text:span></text:p>
              </text:list-item>
              <text:list-item>
                <text:p text:style-name="P48"><text:span text:style-name="Strong_20_Emphasis"><text:span text:style-name="T2">Capability</text:span></text:span><text:span text:style-name="T1">: They possess the traditional tools and knowledge for steam-bending rattan and executing intricate weaves like </text:span><text:span text:style-name="Emphasis"><text:span text:style-name="T1">solihiya</text:span></text:span><text:span text:style-name="T1">. This is the ideal partner for the "passenger cabin" or decorative elements of a hybrid trike </text:span><text:a xlink:type="simple" xlink:href="https://www.yellowpages.ca/bus/British-Columbia/North-Vancouver/A-A-Furniture-Repair-Refinishing/7422602.html?requestId=AI_Android_4500050031336_1769945583256" office:target-frame-name="_blank" xlink:show="new" text:style-name="Internet_20_link" text:visited-style-name="Visited_20_Internet_20_Link"><text:span text:style-name="Citation"><text:span text:style-name="T3">Yellowpages</text:span></text:span></text:a><text:a xlink:type="simple" xlink:href="https://www.aafurniturerepair.ca/?requestId=AI_Android_4500050031336_1769945583256" office:target-frame-name="_blank" xlink:show="new" text:style-name="Internet_20_link" text:visited-style-name="Visited_20_Internet_20_Link"><text:span text:style-name="Citation"><text:span text:style-name="T3">Aafurniturerepair</text:span></text:span></text:a><text:span text:style-name="T1">.</text:span></text:p>
              </text:list-item>
            </text:list>
          </text:list-item>
          <text:list-item>
            <text:p text:style-name="P47"><text:span text:style-name="Strong_20_Emphasis"><text:span text:style-name="T2">Coolite Bamboo Products (Vancouver - Downtown Eastside)</text:span></text:span></text:p>
            <text:list>
              <text:list-item>
                <text:p text:style-name="P47"><text:span text:style-name="Strong_20_Emphasis"><text:span text:style-name="T2">Specialty</text:span></text:span><text:span text:style-name="T1">: Direct import and manufacturing of bamboo and rattan products for over 60 years.</text:span></text:p>
              </text:list-item>
              <text:list-item>
                <text:p text:style-name="P48"><text:span text:style-name="Strong_20_Emphasis"><text:span text:style-name="T2">Capability</text:span></text:span><text:span text:style-name="T1">: They act as both a supplier and a specialist in bamboo/rattan giftware and furniture, making them a critical local source for raw Manau rattan or high-quality bamboo poles </text:span><text:a xlink:type="simple" xlink:href="https://coolitebamboo.com/?requestId=AI_Android_4500050031336_1769945583256" office:target-frame-name="_blank" xlink:show="new" text:style-name="Internet_20_link" text:visited-style-name="Visited_20_Internet_20_Link"><text:span text:style-name="Citation"><text:span text:style-name="T3">Coolitebamboo</text:span></text:span></text:a><text:a xlink:type="simple" xlink:href="https://www.cylex-canada.ca/vancouver/rattan%20furniture.html?requestId=AI_Android_4500050031336_1769945583256" office:target-frame-name="_blank" xlink:show="new" text:style-name="Internet_20_link" text:visited-style-name="Visited_20_Internet_20_Link"><text:span text:style-name="Citation"><text:span text:style-name="T3">Cylex-Canada</text:span></text:span></text:a><text:span text:style-name="T1">.</text:span></text:p>
              </text:list-item>
            </text:list>
          </text:list-item>
        </text:list>
        <text:p text:style-name="P7"/>
        <text:h text:style-name="P5" text:outline-level="2">3. Industrial Fabrication &amp; Research</text:h>
        <text:p text:style-name="P10"><text:span text:style-name="T1">For technical advice on </text:span><text:span text:style-name="Strong_20_Emphasis"><text:span text:style-name="T2">laminated bamboo</text:span></text:span><text:span text:style-name="T1">—which requires specialized adhesives and pressing techniques—these institutional and commercial sources are essential.</text:span></text:p>
        <text:list text:style-name="L17">
          <text:list-item>
            <text:p text:style-name="P49"><text:span text:style-name="Strong_20_Emphasis"><text:span text:style-name="T2">UBC Bamboo Applications and Management Group</text:span></text:span></text:p>
            <text:list>
              <text:list-item>
                <text:p text:style-name="P49"><text:span text:style-name="Strong_20_Emphasis"><text:span text:style-name="T2">Specialty</text:span></text:span><text:span text:style-name="T1">: Research led by Dr. Chunping Dai on the environmental and technical applications of bamboo.</text:span></text:p>
              </text:list-item>
              <text:list-item>
                <text:p text:style-name="P50"><text:span text:style-name="Strong_20_Emphasis"><text:span text:style-name="T2">Capability</text:span></text:span><text:span text:style-name="T1">: This group is at the forefront of bamboo lamination science and can provide data on the structural integrity of bamboo composites for commercial use </text:span><text:a xlink:type="simple" xlink:href="https://bamboo.forestry.ubc.ca/?requestId=AI_Android_4500050031336_1769945583256" office:target-frame-name="_blank" xlink:show="new" text:style-name="Internet_20_link" text:visited-style-name="Visited_20_Internet_20_Link"><text:span text:style-name="Citation"><text:span text:style-name="T4">Ubc</text:span></text:span></text:a><text:span text:style-name="T1">.</text:span></text:p>
              </text:list-item>
            </text:list>
          </text:list-item>
          <text:list-item>
            <text:p text:style-name="P49"><text:span text:style-name="Strong_20_Emphasis"><text:span text:style-name="T2">Nadurra Wood Corporation</text:span></text:span></text:p>
            <text:list>
              <text:list-item>
                <text:p text:style-name="P49"><text:span text:style-name="Strong_20_Emphasis"><text:span text:style-name="T2">Specialty</text:span></text:span><text:span text:style-name="T1">: FSC-certified bamboo specialists supplying "Bamply" (bamboo plywood).</text:span></text:p>
              </text:list-item>
              <text:list-item>
                <text:p text:style-name="P50"><text:span text:style-name="Strong_20_Emphasis"><text:span text:style-name="T2">Capability</text:span></text:span><text:span text:style-name="T1">: They provide custom-dimensioned laminated bamboo sheets that can be used as the raw material for a CNC-machined or laminated pedicab frame </text:span><text:a xlink:type="simple" xlink:href="https://www.nadurrawood.com/bamboo-plywood.html?requestId=AI_Android_4500050031336_1769945583256" office:target-frame-name="_blank" xlink:show="new" text:style-name="Internet_20_link" text:visited-style-name="Visited_20_Internet_20_Link"><text:span text:style-name="Citation"><text:span text:style-name="T4">Nadurrawood</text:span></text:span></text:a><text:span text:style-name="T1">.</text:span></text:p>
              </text:list-item>
            </text:list>
          </text:list-item>
        </text:list>
        <text:p text:style-name="P7"/>
        <text:h text:style-name="P5" text:outline-level="2"><text:soft-page-break/>4. Prototyping &amp; Maker Spaces</text:h>
        <text:p text:style-name="P29">If you intend to lead the fabrication yourself or hire a freelance industrial designer, Vancouver’s makerspaces offer the industrial steam-bending and lamination equipment required.</text:p>
        <text:list text:style-name="L18">
          <text:list-item>
            <text:p text:style-name="P51"><text:span text:style-name="Strong_20_Emphasis"><text:span text:style-name="T2">MakerLabs (East Vancouver)</text:span></text:span></text:p>
            <text:list>
              <text:list-item>
                <text:p text:style-name="P51"><text:span text:style-name="Strong_20_Emphasis"><text:span text:style-name="T2">Tools</text:span></text:span><text:span text:style-name="T1">: Large-scale CNC routers, wood shops, and steam-bending resources.</text:span></text:p>
              </text:list-item>
              <text:list-item>
                <text:p text:style-name="P52"><text:span text:style-name="Strong_20_Emphasis"><text:span text:style-name="T2">Value</text:span></text:span><text:span text:style-name="T1">: They offer classes and shop access for custom bamboo lamination and engraving projects </text:span><text:a xlink:type="simple" xlink:href="https://www.makerlabs.com/?requestId=AI_Android_4500050031336_1769945583256" office:target-frame-name="_blank" xlink:show="new" text:style-name="Internet_20_link" text:visited-style-name="Visited_20_Internet_20_Link"><text:span text:style-name="Citation"><text:span text:style-name="T4">Makerlabs</text:span></text:span></text:a><text:span text:style-name="T1">.</text:span></text:p>
              </text:list-item>
            </text:list>
          </text:list-item>
          <text:list-item>
            <text:p text:style-name="P51"><text:span text:style-name="Strong_20_Emphasis"><text:span text:style-name="T2">Vancouver Community Laboratory (CoLab)</text:span></text:span></text:p>
            <text:list>
              <text:list-item>
                <text:p text:style-name="P51"><text:span text:style-name="Strong_20_Emphasis"><text:span text:style-name="T2">Tools</text:span></text:span><text:span text:style-name="T1">: A member-based collective with a full suite of woodworking and metalworking tools.</text:span></text:p>
              </text:list-item>
              <text:list-item>
                <text:p text:style-name="P52"><text:span text:style-name="Strong_20_Emphasis"><text:span text:style-name="T2">Value</text:span></text:span><text:span text:style-name="T1">: Ideal for collaborative builds and "iterative destruction/rebuilding" of vehicle prototypes </text:span><text:a xlink:type="simple" xlink:href="https://vancommunitylab.com/?requestId=AI_Android_4500050031336_1769945583256" office:target-frame-name="_blank" xlink:show="new" text:style-name="Internet_20_link" text:visited-style-name="Visited_20_Internet_20_Link"><text:span text:style-name="Citation"><text:span text:style-name="T4">Vancommunitylab</text:span></text:span></text:a><text:span text:style-name="T1">.</text:span></text:p>
              </text:list-item>
            </text:list>
          </text:list-item>
        </text:list>
        <text:p text:style-name="P7"/>
        <text:h text:style-name="P5" text:outline-level="2">Summary of Local Capabilities</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4">Expertise</text:p>
              </table:table-cell>
              <table:table-cell table:style-name="Table4.A1" office:value-type="string">
                <text:p text:style-name="P14">Recommended Contact</text:p>
              </table:table-cell>
              <table:table-cell table:style-name="Table4.A1" office:value-type="string">
                <text:p text:style-name="P14">Focus Area</text:p>
              </table:table-cell>
            </table:table-row>
          </table:table-header-rows>
          <table:table-row>
            <table:table-cell table:style-name="Table4.A2" office:value-type="string">
              <text:p text:style-name="P15"><text:span text:style-name="Strong_20_Emphasis"><text:span text:style-name="T5">Chassis/Frame</text:span></text:span></text:p>
            </table:table-cell>
            <table:table-cell table:style-name="Table4.B2" office:value-type="string">
              <text:p text:style-name="P15"><text:span text:style-name="Strong_20_Emphasis"><text:span text:style-name="T5">Grass Frames</text:span></text:span></text:p>
            </table:table-cell>
            <table:table-cell table:style-name="Table4.C2" office:value-type="string">
              <text:p text:style-name="P30">Structural bamboo cycling <text:a xlink:type="simple" xlink:href="https://grassframes.ca/?requestId=AI_Android_4500050031336_1769945583256" office:target-frame-name="_blank" xlink:show="new" text:style-name="Internet_20_link" text:visited-style-name="Visited_20_Internet_20_Link"><text:span text:style-name="Citation"><text:span text:style-name="T8">Grassframes</text:span></text:span></text:a></text:p>
            </table:table-cell>
          </table:table-row>
          <table:table-row>
            <table:table-cell table:style-name="Table4.A3" office:value-type="string">
              <text:p text:style-name="P15"><text:span text:style-name="Strong_20_Emphasis"><text:span text:style-name="T5">Curved Rattan</text:span></text:span></text:p>
            </table:table-cell>
            <table:table-cell table:style-name="Table4.B3" office:value-type="string">
              <text:p text:style-name="P15"><text:span text:style-name="Strong_20_Emphasis"><text:span text:style-name="T5">A A Furniture Repair</text:span></text:span></text:p>
            </table:table-cell>
            <table:table-cell table:style-name="Table4.C3" office:value-type="string">
              <text:p text:style-name="P30">Steam bending and weaving <text:a xlink:type="simple" xlink:href="https://www.yellowpages.ca/bus/British-Columbia/North-Vancouver/A-A-Furniture-Repair-Refinishing/7422602.html?requestId=AI_Android_4500050031336_1769945583256" office:target-frame-name="_blank" xlink:show="new" text:style-name="Internet_20_link" text:visited-style-name="Visited_20_Internet_20_Link"><text:span text:style-name="Citation"><text:span text:style-name="T8">Yellowpages</text:span></text:span></text:a></text:p>
            </table:table-cell>
          </table:table-row>
          <table:table-row>
            <table:table-cell table:style-name="Table4.A4" office:value-type="string">
              <text:p text:style-name="P15"><text:span text:style-name="Strong_20_Emphasis"><text:span text:style-name="T5">Material Supply</text:span></text:span></text:p>
            </table:table-cell>
            <table:table-cell table:style-name="Table4.B4" office:value-type="string">
              <text:p text:style-name="P15"><text:span text:style-name="Strong_20_Emphasis"><text:span text:style-name="T5">Coolite Bamboo</text:span></text:span></text:p>
            </table:table-cell>
            <table:table-cell table:style-name="Table4.C4" office:value-type="string">
              <text:p text:style-name="P30">Raw rattan and bamboo poles <text:a xlink:type="simple" xlink:href="https://coolitebamboo.com/?requestId=AI_Android_4500050031336_1769945583256" office:target-frame-name="_blank" xlink:show="new" text:style-name="Internet_20_link" text:visited-style-name="Visited_20_Internet_20_Link"><text:span text:style-name="Citation"><text:span text:style-name="T8">Coolitebamboo</text:span></text:span></text:a></text:p>
            </table:table-cell>
          </table:table-row>
          <table:table-row>
            <table:table-cell table:style-name="Table4.A5" office:value-type="string">
              <text:p text:style-name="P15"><text:span text:style-name="Strong_20_Emphasis"><text:span text:style-name="T5">Lamination Science</text:span></text:span></text:p>
            </table:table-cell>
            <table:table-cell table:style-name="Table4.B5" office:value-type="string">
              <text:p text:style-name="P15"><text:span text:style-name="Strong_20_Emphasis"><text:span text:style-name="T5">UBC Bamboo Group</text:span></text:span></text:p>
            </table:table-cell>
            <table:table-cell table:style-name="Table4.C5" office:value-type="string">
              <text:p text:style-name="P30">Technical R&amp;D <text:a xlink:type="simple" xlink:href="https://bamboo.forestry.ubc.ca/?requestId=AI_Android_4500050031336_1769945583256" office:target-frame-name="_blank" xlink:show="new" text:style-name="Internet_20_link" text:visited-style-name="Visited_20_Internet_20_Link"><text:span text:style-name="Citation"><text:span text:style-name="T8">Ubc</text:span></text:span></text:a></text:p>
            </table:table-cell>
          </table:table-row>
          <table:table-row>
            <table:table-cell table:style-name="Table4.A6" office:value-type="string">
              <text:p text:style-name="P15"><text:span text:style-name="Strong_20_Emphasis"><text:span text:style-name="T5">Custom Fabrication</text:span></text:span></text:p>
            </table:table-cell>
            <table:table-cell table:style-name="Table4.B6" office:value-type="string">
              <text:p text:style-name="P15"><text:span text:style-name="Strong_20_Emphasis"><text:span text:style-name="T5">Bentwood Custom</text:span></text:span></text:p>
            </table:table-cell>
            <table:table-cell table:style-name="Table4.C6" office:value-type="string">
              <text:p text:style-name="P30">Complex bentwood/lamination <text:a xlink:type="simple" xlink:href="https://www.houzz.com/professionals/woodworkers-and-carpenters/bentwood-custom-woodworking-pfvwus-pf~596954102?requestId=AI_Android_4500050031336_1769945583256" office:target-frame-name="_blank" xlink:show="new" text:style-name="Internet_20_link" text:visited-style-name="Visited_20_Internet_20_Link"><text:span text:style-name="Citation"><text:span text:style-name="T8">Houzz</text:span></text:span></text:a></text:p>
            </table:table-cell>
          </table:table-row>
        </table:table>
        <text:h text:style-name="P9" text:outline-level="3">Next Step Recommendation</text:h>
        <text:p text:style-name="P10"><text:span text:style-name="T1">For a structural pedicab build, your first point of contact should be </text:span><text:span text:style-name="Strong_20_Emphasis"><text:span text:style-name="T2">Al Roback at Grass Frames</text:span></text:span><text:span text:style-name="T1">. His experience in building bamboo vehicles specifically in the Vancouver climate is unique. For the rattan </text:span><text:soft-page-break/><text:span text:style-name="T1">canopy and seating components, a consultation with </text:span><text:span text:style-name="Strong_20_Emphasis"><text:span text:style-name="T2">A A Furniture Repair</text:span></text:span><text:span text:style-name="T1"> would provide the necessary steam-bending expertise to match the "Zenith Aero" aesthetic.</text:span></text:p>
        <text:p text:style-name="P18">finish view</text:p>
      </text:section>
      <text:p text:style-name="P19">To move this project forward in Vancouver, you might want to:</text:p>
      <text:list text:style-name="L19">
        <text:list-item>
          <text:p text:style-name="P53">Draft a technical outreach email to Al Roback at Grass Frames for a chassis consultation?</text:p>
        </text:list-item>
        <text:list-item>
          <text:p text:style-name="P53">Contact Coolite Bamboo to check the current availability of Manau rattan poles for steam bending?</text:p>
        </text:list-item>
        <text:list-item>
          <text:p text:style-name="P53">Schedule a visit to MakerLabs to review their wood-bending equipment for a small-scale prototype?</text:p>
        </text:list-item>
      </text:list>
      <text:p text:style-name="P21">finish view</text:p>
      <text:p text:style-name="P22">can the weight limit be boosted to 300 kg if epoxy was used to reinforce the bamboo?</text:p>
      <text:p text:style-name="P23">Show thought process</text:p>
      <text:list text:style-name="L20">
        <text:list-item>
          <text:p text:style-name="P54"><draw:frame draw:style-name="fr1" draw:name="Image28" text:anchor-type="as-char" svg:width="0.423cm" svg:height="0.423cm" draw:z-index="22"><draw:image xlink:href="Pictures/100000000000001C0000001CE9DD5BCF.png" xlink:type="simple" xlink:show="embed" xlink:actuate="onLoad" draw:mime-type="image/png"/></draw:frame></text:p>
        </text:list-item>
        <text:list-item>
          <text:p text:style-name="P54"><draw:frame draw:style-name="fr1" draw:name="Image29" text:anchor-type="as-char" svg:width="0.423cm" svg:height="0.423cm" draw:z-index="23"><draw:image xlink:href="Pictures/100000000000001C0000001CCDEDE242.png" xlink:type="simple" xlink:show="embed" xlink:actuate="onLoad" draw:mime-type="image/png"/></draw:frame></text:p>
        </text:list-item>
        <text:list-item>
          <text:p text:style-name="P55"/>
        </text:list-item>
      </text:list>
      <text:p text:style-name="P25">28 sources</text:p>
      <text:p text:style-name="P6"><text:span text:style-name="T6">Yes, boosting the weight limit to </text:span><text:span text:style-name="Strong_20_Emphasis"><text:span text:style-name="T7">300 kg</text:span></text:span><text:span text:style-name="T6"> is structurally feasible by transitioning from a standard bamboo frame to a composite-reinforced "Zenith Titan" architecture. By utilizing epoxy-saturated fiber wraps (lugs) and internal structural filling, the frame's flexural strength can increase by over </text:span><text:span text:style-name="Strong_20_Emphasis"><text:span text:style-name="T7">64%</text:span></text:span><text:span text:style-name="T6"> , allowing it to safely handle the dynamic stresses of a 300 kg payload </text:span><text:a xlink:type="simple" xlink:href="https://www.youtube.com/watch?requestId=AI_Android_4500050031336_1769946299501&amp;v=DPMMxNCunaw" office:target-frame-name="_blank" xlink:show="new" text:style-name="Internet_20_link" text:visited-style-name="Visited_20_Internet_20_Link"><text:span text:style-name="Citation"><text:span text:style-name="T3">Youtube</text:span></text:span></text:a><text:a xlink:type="simple" xlink:href="https://www.researchgate.net/publication/337214411_Structural_Evaluation_of_Bamboo_Bike_Frames_Experimental_and_Numerical_Analysis?requestId=AI_Android_4500050031336_1769946299501" office:target-frame-name="_blank" xlink:show="new" text:style-name="Internet_20_link" text:visited-style-name="Visited_20_Internet_20_Link"><text:span text:style-name="Citation"><text:span text:style-name="T3">Researchgate</text:span></text:span></text:a><text:span text:style-name="T6">.</text:span></text:p>
      <text:h text:style-name="P43" text:outline-level="3">Evaluation Logic &amp; Methodology</text:h>
      <text:p text:style-name="P56">The feasibility of this 300 kg limit was evaluated based on the following structural criteria:</text:p>
      <text:list text:style-name="L21">
        <text:list-item>
          <text:p text:style-name="P57"><text:span text:style-name="Strong_20_Emphasis"><text:span text:style-name="T7">Matrix Reinforcement (40%)</text:span></text:span><text:span text:style-name="T6">: Analyzed the tensile and flexural gains of using epoxy as a matrix with carbon or hemp fiber "tow" for the joints.</text:span></text:p>
        </text:list-item>
        <text:list-item>
          <text:p text:style-name="P58"><text:span text:style-name="Strong_20_Emphasis"><text:span text:style-name="T7">Compression Resistance (30%)</text:span></text:span><text:span text:style-name="T6">: Evaluated the impact of internal high-density epoxy foam filling to prevent bamboo tube buckling under extreme loads </text:span><text:a xlink:type="simple" xlink:href="https://repo.ijiert.org/index.php/ijiert/article/view/3204/2739?requestId=AI_Android_4500050031336_1769946299501" office:target-frame-name="_blank" xlink:show="new" text:style-name="Internet_20_link" text:visited-style-name="Visited_20_Internet_20_Link"><text:span text:style-name="Citation"><text:span text:style-name="T4">Ijiert</text:span></text:span></text:a><text:span text:style-name="T6">.</text:span></text:p>
        </text:list-item>
        <text:list-item>
          <text:p text:style-name="P57"><text:span text:style-name="Strong_20_Emphasis"><text:span text:style-name="T7">Load Distribution (30%)</text:span></text:span><text:span text:style-name="T6">: Assessed the vertical rigidity of a dual-spine chassis compared to the standard single-beam design to prevent "frame sag."</text:span></text:p>
        </text:list-item>
      </text:list>
      <text:p text:style-name="P26"><text:soft-page-break/><draw:frame draw:style-name="fr1" draw:name="Image30" text:anchor-type="as-char" svg:width="6.629cm" svg:height="7.938cm" draw:z-index="24"><draw:image xlink:href="Pictures/100000000000012C0000012CCEF0F369.png" xlink:type="simple" xlink:show="embed" xlink:actuate="onLoad" draw:mime-type="image/png"/></draw:frame></text:p>
      <text:p text:style-name="P59">Detailed technical specifications for the "Zenith Titan" reinforcement strategies, including carbon-epoxy lug construction and updated system weight estimates, are provided in the report below.</text:p>
      <text:p text:style-name="P27"><draw:frame draw:style-name="fr1" draw:name="Image31" text:anchor-type="as-char" svg:width="0.609cm" svg:height="0.635cm" draw:z-index="25"><draw:image xlink:href="Pictures/1000000100000060000000605F65D74E.png" xlink:type="simple" xlink:show="embed" xlink:actuate="onLoad" draw:mime-type="image/png"/></draw:frame></text:p>
      <text:p text:style-name="P28">Technical Report: Structural Reinforcement For 300 Kg Payload Capacity</text:p>
      <text:section text:style-name="Sect1" text:name="Section4">
        <text:p text:style-name="P6"><text:bookmark text:name="anchor_undefined Copy 3"/><text:span text:style-name="T11">Achieving a </text:span><text:span text:style-name="Strong_20_Emphasis"><text:span text:style-name="T12">300 kg payload capacity</text:span></text:span><text:span text:style-name="T11"> with a bamboo-based frame is technically feasible, provided the construction shifts from a simple pole-and-wrap method to a </text:span><text:span text:style-name="Strong_20_Emphasis"><text:span text:style-name="T12">composite-reinforced structural system</text:span></text:span><text:span text:style-name="T11">. By utilizing epoxy as a matrix and carbon or natural fibers as reinforcement, the frame's flexural strength can be increased by over </text:span><text:span text:style-name="Strong_20_Emphasis"><text:span text:style-name="T12">60%</text:span></text:span><text:span text:style-name="T11"> , enabling it to handle the dynamic stresses of a driver and two large adults plus cargo </text:span><text:a xlink:type="simple" xlink:href="https://www.youtube.com/watch?requestId=AI_Android_4500050031336_1769946299501&amp;v=DPMMxNCunaw" office:target-frame-name="_blank" xlink:show="new" text:style-name="Internet_20_link" text:visited-style-name="Visited_20_Internet_20_Link"><text:span text:style-name="Citation"><text:span text:style-name="T13">Youtube</text:span></text:span></text:a><text:a xlink:type="simple" xlink:href="https://www.researchgate.net/publication/337214411_Structural_Evaluation_of_Bamboo_Bike_Frames_Experimental_and_Numerical_Analysis?requestId=AI_Android_4500050031336_1769946299501" office:target-frame-name="_blank" xlink:show="new" text:style-name="Internet_20_link" text:visited-style-name="Visited_20_Internet_20_Link"><text:span text:style-name="Citation"><text:span text:style-name="T13">Researchgate</text:span></text:span></text:a><text:span text:style-name="T11">.</text:span></text:p>
        <text:p text:style-name="P10"><text:span text:style-name="T1">The following technical report outlines the reinforcement strategies required to transition the Zenith Aero design into a heavy-duty </text:span><text:span text:style-name="Strong_20_Emphasis"><text:span text:style-name="T2">Zenith Titan</text:span></text:span><text:span text:style-name="T1"> configuration.</text:span></text:p>
        <text:p text:style-name="P7"/>
        <text:h text:style-name="P5" text:outline-level="2">Technical Report: Structural Reinforcement for 300 kg Payload Capacity</text:h>
        <text:h text:style-name="P9" text:outline-level="3">1. The Physics of Reinforcement: Epoxy and Fiber</text:h>
        <text:p text:style-name="P6"><text:span text:style-name="T1">Boosting a bamboo frame to a 300 kg limit (a 20% increase over existing high-performance 250 kg cargo prototypes) requires addressing the joints and the internal hollow structure of the bamboo </text:span><text:a xlink:type="simple" xlink:href="https://newatlas.com/urban-transport/bamboo-pedal-assist-cargo-trike-prototype/?requestId=AI_Android_4500050031336_1769946299501" office:target-frame-name="_blank" xlink:show="new" text:style-name="Internet_20_link" text:visited-style-name="Visited_20_Internet_20_Link"><text:span text:style-name="Citation"><text:span text:style-name="T4">Newatlas</text:span></text:span></text:a><text:span text:style-name="T1">.</text:span></text:p>
        <text:list text:style-name="L22">
          <text:list-item>
            <text:p text:style-name="P60"><text:soft-page-break/><text:span text:style-name="Strong_20_Emphasis"><text:span text:style-name="T2">Matrix vs. Reinforcement</text:span></text:span><text:span text:style-name="T1">: In this design, the bamboo acts as the core, while the </text:span><text:span text:style-name="Strong_20_Emphasis"><text:span text:style-name="T2">epoxy-saturated fiber wraps</text:span></text:span><text:span text:style-name="T1"> (lugs) act as the external skeleton. For loads exceeding 200 kg, "carbon tow" or high-density hemp fiber saturated in structural epoxy is recommended to prevent joint shearing </text:span><text:a xlink:type="simple" xlink:href="https://bamboobike.wordpress.com/42-2/?requestId=AI_Android_4500050031336_1769946299501" office:target-frame-name="_blank" xlink:show="new" text:style-name="Internet_20_link" text:visited-style-name="Visited_20_Internet_20_Link"><text:span text:style-name="Citation"><text:span text:style-name="T3">Wordpress</text:span></text:span></text:a><text:a xlink:type="simple" xlink:href="https://bicycles.stackexchange.com/questions/2889/bamboo-bikes-the-verdict?requestId=AI_Android_4500050031336_1769946299501" office:target-frame-name="_blank" xlink:show="new" text:style-name="Internet_20_link" text:visited-style-name="Visited_20_Internet_20_Link"><text:span text:style-name="Citation"><text:span text:style-name="T3">Stackexchange</text:span></text:span></text:a><text:span text:style-name="T1">.</text:span></text:p>
          </text:list-item>
          <text:list-item>
            <text:p text:style-name="P60"><text:span text:style-name="Strong_20_Emphasis"><text:span text:style-name="T2">Flexural Strength</text:span></text:span><text:span text:style-name="T1">: Epoxy-based composites reinforced with bamboo fibers have shown flexural strength improvements of up to </text:span><text:span text:style-name="Strong_20_Emphasis"><text:span text:style-name="T2">64%</text:span></text:span><text:span text:style-name="T1"> compared to natural bamboo alone, effectively turning the frame into a high-strength composite tube </text:span><text:a xlink:type="simple" xlink:href="https://www.youtube.com/watch?requestId=AI_Android_4500050031336_1769946299501&amp;v=DPMMxNCunaw" office:target-frame-name="_blank" xlink:show="new" text:style-name="Internet_20_link" text:visited-style-name="Visited_20_Internet_20_Link"><text:span text:style-name="Citation"><text:span text:style-name="T4">Youtube</text:span></text:span></text:a><text:span text:style-name="T1">.</text:span></text:p>
          </text:list-item>
        </text:list>
        <text:h text:style-name="P9" text:outline-level="3">2. Key Engineering Upgrades for the "Zenith Titan"</text:h>
        <text:p text:style-name="P29">To safely support 300 kg, the Zenith Aero's silhouette must be reinforced at critical stress point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4">Reinforcement Technique</text:p>
              </table:table-cell>
              <table:table-cell table:style-name="Table5.A1" office:value-type="string">
                <text:p text:style-name="P14">Structural Impact</text:p>
              </table:table-cell>
              <table:table-cell table:style-name="Table5.A1" office:value-type="string">
                <text:p text:style-name="P14">Technical Detail</text:p>
              </table:table-cell>
            </table:table-row>
          </table:table-header-rows>
          <table:table-row>
            <table:table-cell table:style-name="Table5.A2" office:value-type="string">
              <text:p text:style-name="P15"><text:span text:style-name="Strong_20_Emphasis"><text:span text:style-name="T5">Carbon-Epoxy Lugs</text:span></text:span></text:p>
            </table:table-cell>
            <table:table-cell table:style-name="Table5.B2" office:value-type="string">
              <text:p text:style-name="P15">Prevents joint failure</text:p>
            </table:table-cell>
            <table:table-cell table:style-name="Table5.C2" office:value-type="string">
              <text:p text:style-name="P30">Multi-layered black carbon fiber wraps at the headtube, bottom bracket, and rear axle <text:a xlink:type="simple" xlink:href="https://www.pinkbike.com/news/earthbounds-high-pivot-bike-is-made-from-bamboo-and-carbon.html?requestId=AI_Android_4500050031336_1769946299501" office:target-frame-name="_blank" xlink:show="new" text:style-name="Internet_20_link" text:visited-style-name="Visited_20_Internet_20_Link"><text:span text:style-name="Citation"><text:span text:style-name="T8">Pinkbike</text:span></text:span></text:a>.</text:p>
            </table:table-cell>
          </table:table-row>
          <table:table-row>
            <table:table-cell table:style-name="Table5.A3" office:value-type="string">
              <text:p text:style-name="P15"><text:span text:style-name="Strong_20_Emphasis"><text:span text:style-name="T5">Internal Structural Filling</text:span></text:span></text:p>
            </table:table-cell>
            <table:table-cell table:style-name="Table5.B3" office:value-type="string">
              <text:p text:style-name="P15">Prevents "buckling"</text:p>
            </table:table-cell>
            <table:table-cell table:style-name="Table5.C3" office:value-type="string">
              <text:p text:style-name="P30">Injecting high-density epoxy foam into the main bamboo spines to increase compression resistance <text:a xlink:type="simple" xlink:href="https://repo.ijiert.org/index.php/ijiert/article/view/3204/2739?requestId=AI_Android_4500050031336_1769946299501" office:target-frame-name="_blank" xlink:show="new" text:style-name="Internet_20_link" text:visited-style-name="Visited_20_Internet_20_Link"><text:span text:style-name="Citation"><text:span text:style-name="T8">Ijiert</text:span></text:span></text:a>.</text:p>
            </table:table-cell>
          </table:table-row>
          <table:table-row>
            <table:table-cell table:style-name="Table5.A4" office:value-type="string">
              <text:p text:style-name="P15"><text:span text:style-name="Strong_20_Emphasis"><text:span text:style-name="T5">Double-Spine Chassis</text:span></text:span></text:p>
            </table:table-cell>
            <table:table-cell table:style-name="Table5.B4" office:value-type="string">
              <text:p text:style-name="P15">Distributes payload</text:p>
            </table:table-cell>
            <table:table-cell table:style-name="Table5.C4" office:value-type="string">
              <text:p text:style-name="P30">Transitioning from a single main beam to a dual-spine laminated bamboo chassis for maximum vertical rigidity <text:a xlink:type="simple" xlink:href="https://vehicleinspection.nzta.govt.nz/__data/assets/pdf_file/0016/103165/Ladder-frame-chassis-design-and-modification.pdf?requestId=AI_Android_4500050031336_1769946299501" office:target-frame-name="_blank" xlink:show="new" text:style-name="Internet_20_link" text:visited-style-name="Visited_20_Internet_20_Link"><text:span text:style-name="Citation"><text:span text:style-name="T8">Govt</text:span></text:span></text:a>.</text:p>
            </table:table-cell>
          </table:table-row>
          <table:table-row>
            <table:table-cell table:style-name="Table5.A5" office:value-type="string">
              <text:p text:style-name="P15"><text:span text:style-name="Strong_20_Emphasis"><text:span text:style-name="T5">Reinforced Rattan Pod</text:span></text:span></text:p>
            </table:table-cell>
            <table:table-cell table:style-name="Table5.B5" office:value-type="string">
              <text:p text:style-name="P15">Passenger safety</text:p>
            </table:table-cell>
            <table:table-cell table:style-name="Table5.C5" office:value-type="string">
              <text:p text:style-name="P30">Weaving 2mm stainless steel or Kevlar wire into the rattan "solihiya" to ensure the seat does not sag over time <text:a xlink:type="simple" xlink:href="https://atc-craft.com/what-is-rattan/?requestId=AI_Android_4500050031336_1769946299501" office:target-frame-name="_blank" xlink:show="new" text:style-name="Internet_20_link" text:visited-style-name="Visited_20_Internet_20_Link"><text:span text:style-name="Citation"><text:span text:style-name="T8">Atc-Craft</text:span></text:span></text:a>.</text:p>
            </table:table-cell>
          </table:table-row>
        </table:table>
        <text:h text:style-name="P9" text:outline-level="3">3. The "Zenith Titan" Conceptual Design</text:h>
        <text:p text:style-name="P12">The Zenith Titan utilizes industrial-grade carbon-fiber wraps (lugs) and dark heat-treated laminated bamboo to create a high-utility, aesthetic heavy-duty vehicle.</text:p>
        <text:p text:style-name="P13"><text:soft-page-break/><draw:frame draw:style-name="fr1" draw:name="Image32" text:anchor-type="as-char" svg:width="7.241cm" svg:height="7.938cm" draw:z-index="26"><draw:image xlink:href="Pictures/100000000000012C0000012CCEF0F369.png" xlink:type="simple" xlink:show="embed" xlink:actuate="onLoad" draw:mime-type="image/png"/></draw:frame></text:p>
        <text:h text:style-name="P61" text:outline-level="3">4. Updated Weight and Capacity Analysis</text:h>
        <text:p text:style-name="P29">Increasing the payload capacity to 300 kg necessitates more material, which affects the total system weight and handling.</text:p>
        <text:list text:style-name="L23">
          <text:list-item>
            <text:p text:style-name="P62"><text:span text:style-name="Strong_20_Emphasis"><text:span text:style-name="T2">Estimated Frame Weight</text:span></text:span><text:span text:style-name="T1">: </text:span><text:span text:style-name="Strong_20_Emphasis"><text:span text:style-name="T2">88–95 kg</text:span></text:span><text:span text:style-name="T1"> (an increase of ~10–15 kg from the Zenith Aero due to dense epoxy lugs and internal reinforcement).</text:span></text:p>
          </text:list-item>
          <text:list-item>
            <text:p text:style-name="P62"><text:span text:style-name="Strong_20_Emphasis"><text:span text:style-name="T2">Max Payload</text:span></text:span><text:span text:style-name="T1">: </text:span><text:span text:style-name="Strong_20_Emphasis"><text:span text:style-name="T2">300 kg</text:span></text:span><text:span text:style-name="T1"> (Safety factor of 1.2x included).</text:span></text:p>
          </text:list-item>
          <text:list-item>
            <text:p text:style-name="P63"><text:span text:style-name="Strong_20_Emphasis"><text:span text:style-name="T2">Performance Note</text:span></text:span><text:span text:style-name="T1">: With a 300 kg load, a </text:span><text:span text:style-name="Strong_20_Emphasis"><text:span text:style-name="T2">mid-drive electric assist motor</text:span></text:span><text:span text:style-name="T1"> (at least 750W-1000W) becomes a necessity rather than an option to ensure the vehicle can navigate inclines safely </text:span><text:a xlink:type="simple" xlink:href="https://newatlas.com/urban-transport/bamboo-pedal-assist-cargo-trike-prototype/?requestId=AI_Android_4500050031336_1769946299501" office:target-frame-name="_blank" xlink:show="new" text:style-name="Internet_20_link" text:visited-style-name="Visited_20_Internet_20_Link"><text:span text:style-name="Citation"><text:span text:style-name="T3">Newatlas</text:span></text:span></text:a><text:a xlink:type="simple" xlink:href="https://www.alibaba.com/product-introduction/New-Style-300cc-Tricycle-Passenger-And_1600853998005.html?requestId=AI_Android_4500050031336_1769946299501" office:target-frame-name="_blank" xlink:show="new" text:style-name="Internet_20_link" text:visited-style-name="Visited_20_Internet_20_Link"><text:span text:style-name="Citation"><text:span text:style-name="T3">Alibaba</text:span></text:span></text:a><text:span text:style-name="T1">.</text:span></text:p>
          </text:list-item>
        </text:list>
        <text:p text:style-name="P7"/>
        <text:h text:style-name="P9" text:outline-level="3">Conclusion &amp; Next Steps</text:h>
        <text:p text:style-name="P10"><text:span text:style-name="T1">By reinforcing the laminated bamboo with industrial epoxy and carbon fiber "lugs," you can achieve a 300 kg limit. This configuration, the </text:span><text:span text:style-name="Strong_20_Emphasis"><text:span text:style-name="T2">Zenith Titan</text:span></text:span><text:span text:style-name="T1">, bridges the gap between a sustainable bicycle and a light-duty commercial vehicle.</text:span></text:p>
        <text:p text:style-name="P29">To proceed with this heavy-duty build, you might want to:</text:p>
        <text:list text:style-name="L24">
          <text:list-item>
            <text:p text:style-name="P64"><text:span text:style-name="Strong_20_Emphasis"><text:span text:style-name="T2">Consult with Carbon-Fiber Specialists</text:span></text:span><text:span text:style-name="T1">: Seek a workshop (like </text:span><text:span text:style-name="Strong_20_Emphasis"><text:span text:style-name="T2">MakerLabs</text:span></text:span><text:span text:style-name="T1"> in Vancouver) to assist with the epoxy vacuum-bagging process for the joints </text:span><text:a xlink:type="simple" xlink:href="https://www.makerlabs.com/?requestId=AI_Android_4500050031336_1769946299501" office:target-frame-name="_blank" xlink:show="new" text:style-name="Internet_20_link" text:visited-style-name="Visited_20_Internet_20_Link"><text:span text:style-name="Citation"><text:span text:style-name="T4">Makerlabs</text:span></text:span></text:a><text:span text:style-name="T1">.</text:span></text:p>
          </text:list-item>
          <text:list-item>
            <text:p text:style-name="P65"><text:soft-page-break/><text:span text:style-name="Strong_20_Emphasis"><text:span text:style-name="T2">Source Heavy-Duty Drivetrains</text:span></text:span><text:span text:style-name="T1">: Identify 300 kg-rated axles and hubs, as standard bicycle components may fail under this payload.</text:span></text:p>
          </text:list-item>
          <text:list-item>
            <text:p text:style-name="P65"><text:span text:style-name="Strong_20_Emphasis"><text:span text:style-name="T2">Refine the Motor Specification</text:span></text:span><text:span text:style-name="T1">: Calculate the torque requirements for a 400 kg total system weight (vehicle + payload) on local Vancouver gradients.</text:span></text:p>
          </text:list-item>
        </text:list>
        <text:p text:style-name="P18">finish view</text:p>
      </text:section>
      <text:p text:style-name="P19">To advance this heavy-duty build, you might want to:</text:p>
      <text:list text:style-name="L25">
        <text:list-item>
          <text:p text:style-name="P66">Calculate the torque requirements for a 750W-1000W electric motor to handle the 400 kg total system weight?</text:p>
        </text:list-item>
        <text:list-item>
          <text:p text:style-name="P66">Consult with a local shop like MakerLabs on the vacuum-bagging process for the epoxy joints?</text:p>
        </text:list-item>
        <text:list-item>
          <text:p text:style-name="P66">Source heavy-duty axles and hubs specifically rated for 300 kg+ payloads?</text:p>
        </text:list-item>
      </text:list>
      <text:p text:style-name="P21">finish view</text:p>
      <text:p text:style-name="P22">do you also help with financing? I'm wondering if there are wood-related grants I can tap into here in British Columbia for this bamboo/rattan pedicab?</text:p>
      <text:p text:style-name="P67">Thinking through your request to create the most effective approach and detailed action plan...</text:p>
      <text:p text:style-name="P68">Agent task</text:p>
      <text:h text:style-name="P69" text:outline-level="1">Identify wood-related grants in British Columbia</text:h>
      <text:p text:style-name="P70">Identify provincial and federal grant programs supporting sustainable materials in British Columbia</text:p>
      <text:list text:style-name="L26">
        <text:list-item>
          <text:p text:style-name="P71">Use the BC Government’s Green Economy and Innovation funding portal to locate grants for eco-materials, circular design, or sustainable transportation</text:p>
        </text:list-item>
        <text:list-item>
          <text:p text:style-name="P72">Search for programs targeting small manufacturers, artisans, or green product development with bamboo or natural fiber use</text:p>
        </text:list-item>
      </text:list>
      <text:p text:style-name="P70">Locate industry-specific funding for bamboo/rattan product innovation</text:p>
      <text:list text:style-name="L27">
        <text:list-item>
          <text:p text:style-name="P73"/>
        </text:list-item>
      </text:list>
      <text:p text:style-name="P70">Explore non-profit and academic partnership opportunitie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Inter, 'SF Pro', Roboto, 'Helvetica Neue', Helvetica, Tahoma, Arial, 'PingFang SC', 'Microsoft YaHei'"/>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2T09:11:34.289509500</meta:creation-date>
    <dc:date>2026-02-02T09:15:19.514759800</dc:date>
    <meta:editing-duration>PT3M46S</meta:editing-duration>
    <meta:editing-cycles>1</meta:editing-cycles>
    <meta:generator>LibreOffice/25.8.3.2$Windows_X86_64 LibreOffice_project/8ca8d55c161d602844f5428fa4b58097424e324e</meta:generator>
    <meta:document-statistic meta:table-count="5" meta:image-count="25" meta:object-count="0" meta:page-count="20" meta:paragraph-count="323" meta:word-count="3883" meta:character-count="26977" meta:non-whitespace-character-count="23490"/>
  </office:meta>
</office:document-meta>
</file>