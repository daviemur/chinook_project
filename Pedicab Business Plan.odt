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4F00000500319ABA9B.jpg" manifest:media-type="image/jpeg"/>
  <manifest:file-entry manifest:full-path="Pictures/10000000000003210000028684BC80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V Noto Sans" svg:font-family="'CoV Noto Sans',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3.053cm" table:align="left"/>
    </style:style>
    <style:style style:name="Table1.A" style:family="table-column">
      <style:table-column-properties style:column-width="2.447cm"/>
    </style:style>
    <style:style style:name="Table1.B" style:family="table-column">
      <style:table-column-properties style:column-width="2.443cm"/>
    </style:style>
    <style:style style:name="Table1.C" style:family="table-column">
      <style:table-column-properties style:column-width="2.111cm"/>
    </style:style>
    <style:style style:name="Table1.D" style:family="table-column">
      <style:table-column-properties style:column-width="3.182cm"/>
    </style:style>
    <style:style style:name="Table1.E" style:family="table-column">
      <style:table-column-properties style:column-width="2.87cm"/>
    </style:style>
    <style:style style:name="Table1.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officeooo:rsid="001b9f47"/>
    </style:style>
    <style:style style:name="P2" style:family="paragraph" style:parent-style-name="Text_20_body">
      <style:text-properties officeooo:rsid="0024b1e2" officeooo:paragraph-rsid="0024b1e2"/>
    </style:style>
    <style:style style:name="P3" style:family="paragraph" style:parent-style-name="Text_20_body">
      <style:text-properties fo:font-weight="bold" officeooo:rsid="001b9f47" officeooo:paragraph-rsid="0024b1e2" style:font-weight-asian="bold" style:font-weight-complex="bold"/>
    </style:style>
    <style:style style:name="P4" style:family="paragraph" style:parent-style-name="Text_20_body">
      <style:text-properties fo:font-weight="bold" officeooo:rsid="0024b1e2" officeooo:paragraph-rsid="0024b1e2" style:font-weight-asian="bold" style:font-weight-complex="bold"/>
    </style:style>
    <style:style style:name="P5" style:family="paragraph" style:parent-style-name="Text_20_body">
      <loext:graphic-properties draw:fill="none"/>
      <style:paragraph-properties fo:margin-left="0cm" fo:margin-right="9.601cm" fo:margin-top="0cm" fo:margin-bottom="0.247cm" style:contextual-spacing="false" fo:line-height="115%" fo:text-indent="0cm" style:auto-text-indent="false" fo:background-color="transparent"/>
      <style:text-properties style:text-underline-style="solid" style:text-underline-width="auto" style:text-underline-color="font-color" fo:font-weight="normal" officeooo:rsid="001d96d5" style:font-weight-asian="normal" style:font-weight-complex="normal"/>
    </style:style>
    <style:style style:name="P6" style:family="paragraph" style:parent-style-name="Text_20_body">
      <style:text-properties officeooo:rsid="001b9f47"/>
    </style:style>
    <style:style style:name="P7" style:family="paragraph" style:parent-style-name="Text_20_body" style:list-style-name="L1">
      <style:paragraph-properties fo:line-height="100%"/>
      <style:text-properties officeooo:rsid="001b9f47"/>
    </style:style>
    <style:style style:name="P8" style:family="paragraph" style:parent-style-name="Text_20_body" style:list-style-name="L1">
      <style:paragraph-properties fo:line-height="100%"/>
      <style:text-properties officeooo:rsid="0024b1e2" officeooo:paragraph-rsid="0024b1e2"/>
    </style:style>
    <style:style style:name="P9" style:family="paragraph" style:parent-style-name="Text_20_body" style:list-style-name="L1">
      <style:paragraph-properties fo:line-height="100%">
        <style:tab-stops>
          <style:tab-stop style:position="15.48cm"/>
        </style:tab-stops>
      </style:paragraph-properties>
      <style:text-properties officeooo:rsid="001b9f47" officeooo:paragraph-rsid="001d96d5"/>
    </style:style>
    <style:style style:name="P10" style:family="paragraph" style:parent-style-name="Heading_20_3">
      <style:text-properties officeooo:rsid="001b9f47"/>
    </style:style>
    <style:style style:name="P11" style:family="paragraph" style:parent-style-name="Heading_20_3">
      <style:text-properties officeooo:rsid="0025a24f" officeooo:paragraph-rsid="0025a24f"/>
    </style:style>
    <style:style style:name="P12" style:family="paragraph" style:parent-style-name="Text_20_body" style:list-style-name="L2">
      <style:text-properties officeooo:rsid="0024b1e2" officeooo:paragraph-rsid="0025a24f"/>
    </style:style>
    <style:style style:name="P13" style:family="paragraph" style:parent-style-name="Text_20_body" style:list-style-name="L2">
      <style:text-properties officeooo:rsid="0025a24f" officeooo:paragraph-rsid="0025a24f"/>
    </style:style>
    <style:style style:name="P14" style:family="paragraph" style:parent-style-name="Text_20_body" style:list-style-name="L2">
      <style:text-properties officeooo:rsid="001b9f47"/>
    </style:style>
    <style:style style:name="P15" style:family="paragraph" style:parent-style-name="Text_20_body" style:list-style-name="L2">
      <style:text-properties officeooo:rsid="0024b1e2" officeooo:paragraph-rsid="0024b1e2"/>
    </style:style>
    <style:style style:name="P16" style:family="paragraph" style:parent-style-name="Text_20_body" style:list-style-name="L2">
      <style:text-properties officeooo:paragraph-rsid="0026fdc6"/>
    </style:style>
    <style:style style:name="P17" style:family="paragraph" style:parent-style-name="Text_20_body">
      <style:text-properties officeooo:rsid="001b9f47" officeooo:paragraph-rsid="0025a24f"/>
    </style:style>
    <style:style style:name="P18" style:family="paragraph" style:parent-style-name="Text_20_body">
      <style:text-properties officeooo:rsid="0026fdc6" officeooo:paragraph-rsid="0026fdc6"/>
    </style:style>
    <style:style style:name="P19" style:family="paragraph" style:parent-style-name="Text_20_body">
      <style:text-properties officeooo:rsid="001b9f47" officeooo:paragraph-rsid="0024b1e2"/>
    </style:style>
    <style:style style:name="P20" style:family="paragraph" style:parent-style-name="Standard">
      <style:text-properties officeooo:rsid="001b9f47"/>
    </style:style>
    <style:style style:name="P21" style:family="paragraph" style:parent-style-name="Standard">
      <style:text-properties fo:font-size="16pt" fo:font-weight="bold" officeooo:rsid="00215c95" officeooo:paragraph-rsid="00215c95" style:font-size-asian="16pt" style:font-weight-asian="bold" style:font-size-complex="16pt" style:font-weight-complex="bold"/>
    </style:style>
    <style:style style:name="P22" style:family="paragraph" style:parent-style-name="Standard">
      <style:text-properties officeooo:rsid="00215c95" officeooo:paragraph-rsid="00215c95"/>
    </style:style>
    <style:style style:name="P23" style:family="paragraph" style:parent-style-name="Text_20_body">
      <style:text-properties fo:font-variant="normal" fo:text-transform="none" fo:color="#444444" loext:opacity="100%" style:font-name="CoV Noto Sans" fo:font-size="12pt" fo:letter-spacing="normal" fo:font-style="normal" fo:font-weight="normal" officeooo:rsid="00215c95" officeooo:paragraph-rsid="00215c95"/>
    </style:style>
    <style:style style:name="P24" style:family="paragraph" style:parent-style-name="Text_20_body" style:list-style-name="L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44444" loext:opacity="100%" style:font-name="CoV Noto Sans" fo:font-size="12pt" fo:letter-spacing="normal" fo:font-style="normal" fo:font-weight="normal" officeooo:rsid="00215c95"/>
    </style:style>
    <style:style style:name="P25" style:family="paragraph" style:parent-style-name="Text_20_body" style:list-style-name="L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44444" loext:opacity="100%" style:font-name="CoV Noto Sans" fo:font-size="12pt" fo:letter-spacing="normal" fo:font-style="normal" fo:font-weight="normal" officeooo:rsid="00215c95"/>
    </style:style>
    <style:style style:name="P2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44444" loext:opacity="100%" style:font-name="CoV Noto Sans" fo:font-size="12pt" fo:letter-spacing="normal" fo:font-style="normal" fo:font-weight="normal" officeooo:rsid="00215c95"/>
    </style:style>
    <style:style style:name="P2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44444" loext:opacity="100%" style:font-name="CoV Noto Sans" fo:font-size="12pt" fo:letter-spacing="normal" fo:font-style="normal" fo:font-weight="normal" officeooo:rsid="00215c95"/>
    </style:style>
    <style:style style:name="P28" style:family="paragraph" style:parent-style-name="Standard">
      <style:text-properties fo:font-size="16pt" fo:font-weight="bold" officeooo:rsid="00215c95" officeooo:paragraph-rsid="0028dcf9" style:font-size-asian="16pt" style:font-weight-asian="bold" style:font-size-complex="16pt" style:font-weight-complex="bold"/>
    </style:style>
    <style:style style:name="T1" style:family="text">
      <style:text-properties officeooo:rsid="0024b1e2"/>
    </style:style>
    <style:style style:name="T2" style:family="text">
      <style:text-properties style:text-underline-style="solid" style:text-underline-width="auto" style:text-underline-color="font-color"/>
    </style:style>
    <style:style style:name="T3" style:family="text">
      <style:text-properties officeooo:rsid="001b9f47"/>
    </style:style>
    <style:style style:name="T4" style:family="text">
      <style:text-properties fo:font-weight="bold" officeooo:rsid="001b9f47" style:font-weight-asian="bold" style:font-weight-complex="bold"/>
    </style:style>
    <style:style style:name="T5" style:family="text">
      <style:text-properties fo:font-weight="bold" officeooo:rsid="001d96d5" style:font-weight-asian="bold" style:font-weight-complex="bold"/>
    </style:style>
    <style:style style:name="T6" style:family="text">
      <style:text-properties officeooo:rsid="001fc4a9"/>
    </style:style>
    <style:style style:name="T7" style:family="text">
      <style:text-properties officeooo:rsid="001d96d5"/>
    </style:style>
    <style:style style:name="T8" style:family="text">
      <style:text-properties officeooo:rsid="0025a24f"/>
    </style:style>
    <style:style style:name="T9" style:family="text">
      <style:text-properties officeooo:rsid="0026fdc6"/>
    </style:style>
    <style:style style:name="T10" style:family="text">
      <style:text-properties officeooo:rsid="0028dcf9"/>
    </style:style>
    <style:style style:name="T11" style:family="text">
      <style:text-properties fo:font-size="16pt" style:font-size-asian="16pt" style:font-size-complex="16pt"/>
    </style:style>
    <style:style style:name="T12" style:family="text">
      <style:text-properties fo:font-size="12pt" style:font-size-asian="12pt" style:font-size-complex="12pt"/>
    </style:style>
    <style:style style:name="T13" style:family="text">
      <style:text-properties fo:font-size="12pt" officeooo:rsid="0026fdc6" style:font-size-asian="12pt" style:font-size-complex="12pt"/>
    </style:style>
    <style:style style:name="fr1" style:family="graphic" style:parent-style-name="Graphics">
      <style:graphic-properties fo:margin-left="0cm" fo:margin-right="0cm" style:wrap="dynamic" style:number-wrapped-paragraphs="no-limit" style:wrap-contour="false" style:vertical-pos="from-top" style:vertical-rel="paragraph" style:horizontal-pos="from-left" style:horizontal-rel="paragraph" style:mirror="none" fo:clip="rect(9.04cm, 0cm, 13.561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al for <text:span text:style-name="T1">Investment or Loan</text:span></text:h>
      <text:p text:style-name="P2"><text:span text:style-name="T2"><text:tab/><text:tab/><text:tab/><text:tab/><text:tab/><text:tab/><text:tab/><text:tab/>Contact: </text:span><text:s/><text:tab/><text:span text:style-name="Strong_20_Emphasis"><text:span text:style-name="T3">David Murphy</text:span></text:span><text:span text:style-name="T3"> </text:span></text:p>
      <text:p text:style-name="P3"><text:tab/><text:tab/><text:tab/><text:tab/><text:tab/><text:tab/><text:tab/><text:tab/><text:tab/><text:tab/>832 East Pender Street</text:p>
      <text:p text:style-name="P2"><text:span text:style-name="T4"><text:tab/><text:tab/><text:tab/><text:tab/><text:tab/><text:tab/><text:tab/><text:tab/><text:tab/><text:tab/>Vancouver, BC, </text:span><text:span text:style-name="T5">V6A 1W1</text:span></text:p>
      <text:p text:style-name="P4"><text:tab/><text:tab/><text:tab/><text:tab/><text:tab/><text:tab/><text:tab/><text:tab/><text:tab/><text:tab/>(778) 675-3306</text:p>
      <text:p text:style-name="P5"/>
      <text:p text:style-name="P6"><text:span text:style-name="T1">Dear Friends</text:span>,</text:p>
      <text:p text:style-name="P6">They say it’s better to give than to receive—and I honestly feel great giving you this opportunity to give to me a viable business venture that benefits everyone involved. No need to say “thank you,” and I won’t bore you with “you’re welcome.” Instead, let’s cut straight to the meat of it.</text:p>
      <text:p text:style-name="P6">Here’s the plan: you help me obtain a loan of roughly <text:span text:style-name="Strong_20_Emphasis">$</text:span><text:span text:style-name="Strong_20_Emphasis"><text:span text:style-name="T6">2</text:span></text:span><text:span text:style-name="Strong_20_Emphasis">,850</text:span> (either through the bank or directly). The bulk of this will go toward purchasing and shipping a <text:span text:style-name="Strong_20_Emphasis">tricycle rickshaw (trikeshaw)</text:span> from China.</text:p>
      <text:p text:style-name="P6"/>
      <text:p text:style-name="P6"><draw:frame draw:style-name="fr1" draw:name="Image1" text:anchor-type="char" svg:x="4.604cm" svg:y="-0.037cm" svg:width="7.101cm" svg:height="7.696cm" draw:z-index="0"><draw:image xlink:href="Pictures/100000000000024F00000500319ABA9B.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This regal ride seats <text:span text:style-name="T1">two </text:span>passengers <text:span text:style-name="T1">plus a driver </text:span>and can be used for:</text:p>
      <text:list text:style-name="L1">
        <text:list-item>
          <text:p text:style-name="P7">Scenic tours around Stanley Park or downtown</text:p>
        </text:list-item>
        <text:list-item>
          <text:p text:style-name="P7">Stadium runs before and after games</text:p>
        </text:list-item>
        <text:list-item>
          <text:p text:style-name="P8">Advertising tourism-related businesses</text:p>
        </text:list-item>
        <text:list-item>
          <text:p text:style-name="P9">Film set props for Vancouver’s production house<text:span text:style-name="T7">s</text:span></text:p>
        </text:list-item>
        <text:list-item>
          <text:p text:style-name="P9">A rolling platform for political or cultural movements</text:p>
        </text:list-item>
      </text:list>
      <text:p text:style-name="P6"/>
      <text:h text:style-name="P10" text:outline-level="3"><text:soft-page-break/>📊 Revenue Projectio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cenario</text:p>
            </table:table-cell>
            <table:table-cell table:style-name="Table1.A1" office:value-type="string">
              <text:p text:style-name="Table_20_Heading">Hours/Week</text:p>
            </table:table-cell>
            <table:table-cell table:style-name="Table1.A1" office:value-type="string">
              <text:p text:style-name="Table_20_Heading">Rate/Hour</text:p>
            </table:table-cell>
            <table:table-cell table:style-name="Table1.A1" office:value-type="string">
              <text:p text:style-name="Table_20_Heading">Weekly Revenue</text:p>
            </table:table-cell>
            <table:table-cell table:style-name="Table1.A1" office:value-type="string">
              <text:p text:style-name="Table_20_Heading">6-Month Total</text:p>
            </table:table-cell>
          </table:table-row>
        </table:table-header-rows>
        <table:table-row>
          <table:table-cell table:style-name="Table1.A1" office:value-type="string">
            <text:p text:style-name="Table_20_Contents">Conservative</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300</text:p>
          </table:table-cell>
          <table:table-cell table:style-name="Table1.A1" office:value-type="string">
            <text:p text:style-name="Table_20_Contents">$7,200</text:p>
          </table:table-cell>
        </table:table-row>
        <table:table-row>
          <table:table-cell table:style-name="Table1.A1" office:value-type="string">
            <text:p text:style-name="Table_20_Contents">Moderate</text:p>
          </table:table-cell>
          <table:table-cell table:style-name="Table1.A1" office:value-type="string">
            <text:p text:style-name="Table_20_Contents">15</text:p>
          </table:table-cell>
          <table:table-cell table:style-name="Table1.A1" office:value-type="string">
            <text:p text:style-name="Table_20_Contents">$40</text:p>
          </table:table-cell>
          <table:table-cell table:style-name="Table1.A1" office:value-type="string">
            <text:p text:style-name="Table_20_Contents">$600</text:p>
          </table:table-cell>
          <table:table-cell table:style-name="Table1.A1" office:value-type="string">
            <text:p text:style-name="Table_20_Contents">$14,400</text:p>
          </table:table-cell>
        </table:table-row>
        <table:table-row>
          <table:table-cell table:style-name="Table1.A1" office:value-type="string">
            <text:p text:style-name="Table_20_Contents">Optimistic</text:p>
          </table:table-cell>
          <table:table-cell table:style-name="Table1.A1" office:value-type="string">
            <text:p text:style-name="Table_20_Contents">20</text:p>
          </table:table-cell>
          <table:table-cell table:style-name="Table1.A1" office:value-type="string">
            <text:p text:style-name="Table_20_Contents">$50</text:p>
          </table:table-cell>
          <table:table-cell table:style-name="Table1.A1" office:value-type="string">
            <text:p text:style-name="Table_20_Contents">$1,000</text:p>
          </table:table-cell>
          <table:table-cell table:style-name="Table1.A1" office:value-type="string">
            <text:p text:style-name="Table_20_Contents">$24,000</text:p>
          </table:table-cell>
        </table:table-row>
      </table:table>
      <text:h text:style-name="P11" text:outline-level="3"><text:span text:style-name="Strong_20_Emphasis"/></text:h>
      <text:h text:style-name="P11" text:outline-level="3">Upfront Business Costs<text:line-break/></text:h>
      <text:list text:style-name="L2">
        <text:list-item>
          <text:p text:style-name="P12"><text:span text:style-name="T8">Business Licence</text:span><text:tab/><text:span text:style-name="T8">$250</text:span></text:p>
        </text:list-item>
        <text:list-item>
          <text:p text:style-name="P13">Pedicab + Shipping<text:tab/>$1800</text:p>
        </text:list-item>
      </text:list>
      <text:h text:style-name="P11" text:outline-level="3">Annual Business Costs</text:h>
      <text:list text:continue-numbering="true" text:style-name="L2">
        <text:list-header>
          <text:p text:style-name="P14"/>
        </text:list-header>
        <text:list-item>
          <text:p text:style-name="P15">Pedicab permit<text:tab/><text:span text:style-name="T8">$250</text:span></text:p>
        </text:list-item>
        <text:list-item>
          <text:p text:style-name="P16"><text:span text:style-name="T3">Insu</text:span><text:span text:style-name="T1">r</text:span><text:span text:style-name="T3">ance<text:tab/><text:tab/></text:span><text:span text:style-name="T8">$50</text:span></text:p>
        </text:list-item>
        <text:list-item>
          <text:p text:style-name="P13">Maintenance<text:tab/><text:tab/>$200</text:p>
        </text:list-item>
        <text:list-item>
          <text:p text:style-name="P13">Bookkeeping<text:tab/><text:tab/>$100</text:p>
          <text:p text:style-name="P13"/>
        </text:list-item>
      </text:list>
      <text:p text:style-name="P17">You’ve probably seen a few of these around town—but not many. That’s the opportunity. <text:s/><text:span text:style-name="T9">There are 60 permits issued each year and last year’s holders get first offer to renew permit.</text:span></text:p>
      <text:p text:style-name="P17">Rain or shine, this vehicle earns its keep. Local operators currently charge <text:span text:style-name="Strong_20_Emphasis">$30–$50 per hour</text:span>, plus tips. Th<text:span text:style-name="T1">is is</text:span> a lean, street-smart business with minimal overhead and strong earning potential.</text:p>
      <text:p text:style-name="P18">There is a supplemental section after this page for those who want to wade in the weeds.</text:p>
      <text:p text:style-name="P19"><text:span text:style-name="T10">Thanks for reading, a</text:span><text:span text:style-name="T9">nd i</text:span>f I forget <text:span text:style-name="T1">to tell you </text:span>later,.......................................<text:span text:style-name="T11">you’re welcome!</text:span> </text:p>
      <text:p text:style-name="P19">Feels good, right?</text:p>
      <text:p text:style-name="P19"/>
      <text:p text:style-name="P6">—David</text:p>
      <text:p text:style-name="P20"/>
      <text:p text:style-name="P20"/>
      <text:p text:style-name="P20"/>
      <text:p text:style-name="P20"/>
      <text:p text:style-name="P20"/>
      <text:p text:style-name="P20"/>
      <text:p text:style-name="P20"/>
      <text:p text:style-name="P20"><text:soft-page-break/></text:p>
      <text:p text:style-name="P21">Supplemental <text:span text:style-name="T9">Part A: </text:span><text:span text:style-name="T10">Rules &amp; Regs</text:span><text:span text:style-name="T9"><text:tab/><text:tab/></text:span><text:span text:style-name="T12">- </text:span><text:span text:style-name="T13">City of Vancouver</text:span></text:p>
      <text:p text:style-name="P22"/>
      <text:p text:style-name="P22"/>
      <text:p text:style-name="P23">An owner of a pedicab must:</text:p>
      <text:list text:style-name="L3">
        <text:list-item>
          <text:p text:style-name="P24">Demonstrate, at the City's request, that the pedicab is available for transporting passengers</text:p>
        </text:list-item>
        <text:list-item>
          <text:p text:style-name="P24">Ensure that parking, storage and maintenance of the pedicab occurs only on private property, except for parking on streets in accordance with other bylaws during business hours while waiting for customers</text:p>
        </text:list-item>
      </text:list>
      <text:p text:style-name="P23">All pedicab operators must:</text:p>
      <text:list text:style-name="L4">
        <text:list-item>
          <text:p text:style-name="P25">Have the brakes of each pedicab inspected at least annually by a bicycle repair shop that has a current business licence issued by a municipality, and promptly undertakes any repair or maintenance to the brakes disclosed by such inspection</text:p>
        </text:list-item>
        <text:list-item>
          <text:p text:style-name="P25">Retain the records of any inspection, repair, or maintenance for at least two years, and makes these records available to the inspector</text:p>
        </text:list-item>
        <text:list-item>
          <text:p text:style-name="P25">Inspect the brakes and other safety equipment each day prior to operating the pedicab and make adjustments if necessary</text:p>
        </text:list-item>
        <text:list-item>
          <text:p text:style-name="P25">Obey all provisions of the Street and Traffic Bylaw 2849 and Motor Vehicle Act (normally those applicable to the definition of a vehicle)</text:p>
        </text:list-item>
        <text:list-item>
          <text:p text:style-name="P25">Not stop to load and unload passengers in any location which would disrupt traffic</text:p>
        </text:list-item>
      </text:list>
      <text:p text:style-name="P23">Pedicabs must be equipped with:</text:p>
      <text:list text:style-name="L5">
        <text:list-item>
          <text:p text:style-name="P26">Rear hydraulic brakes and front V-brakes, or another braking system approved by the inspector</text:p>
        </text:list-item>
        <text:list-item>
          <text:p text:style-name="P26">Front headlight and rear tail lights and rear flashing light (for night time operations)</text:p>
        </text:list-item>
        <text:list-item>
          <text:p text:style-name="P26">Turn signal lights and a standard bell</text:p>
        </text:list-item>
        <text:list-item>
          <text:p text:style-name="P26">Reflectors on wheels, carriages, and rear bumper, or similar protection</text:p>
        </text:list-item>
        <text:list-item>
          <text:p text:style-name="P26">Rear mud flaps, or similar protection</text:p>
        </text:list-item>
        <text:list-item>
          <text:p text:style-name="P26">First aid and repair kit</text:p>
        </text:list-item>
        <text:list-item>
          <text:p text:style-name="P26">Six-foot safety flag (unless rooftop design exceeds six feet)</text:p>
        </text:list-item>
        <text:list-item>
          <text:p text:style-name="P26">Business name and identification number that uniquely identifies each pedicab, and is painted or permanently affixed in figures at least 5 cm high, on each side and to the rear of the pedicab</text:p>
        </text:list-item>
      </text:list>
      <text:p text:style-name="P27"/>
      <text:p text:style-name="P28"><text:soft-page-break/>Supplemental <text:span text:style-name="T9">Part </text:span><text:span text:style-name="T10">B</text:span><text:span text:style-name="T9">: </text:span><text:span text:style-name="T10">Pedicab Routes – City of Vancouver</text:span></text:p>
      <text:p text:style-name="P28"/>
      <text:p text:style-name="P28"/>
      <text:p text:style-name="P28"/>
      <text:p text:style-name="P28"><draw:frame draw:style-name="fr2" draw:name="Image2" text:anchor-type="char" svg:width="16.955cm" svg:height="13.674cm" draw:z-index="1"><draw:image xlink:href="Pictures/10000000000003210000028684BC801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V Noto Sans" svg:font-family="'CoV Noto Sans',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1:30:30.163454800</meta:creation-date>
    <dc:date>2026-01-23T18:04:13.512930600</dc:date>
    <meta:editing-duration>PT19H48M51S</meta:editing-duration>
    <meta:editing-cycles>5</meta:editing-cycles>
    <meta:generator>LibreOffice/25.8.3.2$Windows_X86_64 LibreOffice_project/8ca8d55c161d602844f5428fa4b58097424e324e</meta:generator>
    <meta:document-statistic meta:table-count="1" meta:image-count="2" meta:object-count="0" meta:page-count="4" meta:paragraph-count="71" meta:word-count="615" meta:character-count="3683" meta:non-whitespace-character-count="3119"/>
  </office:meta>
</office:document-meta>
</file>