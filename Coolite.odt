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, Inter, 'SF Pro', Roboto, 'Helvetica Neue', Helvetica, Tahoma, Arial, 'PingFang SC', 'Microsoft YaHei'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222222" loext:opacity="100%" style:font-name="Noto Sans" fo:font-size="18pt" fo:letter-spacing="normal" fo:font-style="normal" fo:font-weight="bold" style:font-weight-asian="bold" style:font-weight-complex="bold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75%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.212cm" fo:margin-bottom="0.212cm" style:contextual-spacing="false" fo:line-height="175%" fo:orphans="2" fo:widows="2" fo:text-indent="0cm" style:auto-text-indent="false"/>
      <style:text-properties fo:font-variant="normal" fo:text-transform="none" fo:color="#222222" loext:opacity="100%" style:font-name="Noto Sans" fo:font-size="12pt" fo:letter-spacing="normal" fo:font-style="normal" fo:font-weight="normal" style:font-weight-asian="normal" style:font-weight-complex="normal"/>
    </style:style>
    <style:style style:name="P4" style:family="paragraph" style:parent-style-name="Heading_20_3">
      <style:paragraph-properties fo:margin-left="0cm" fo:margin-right="0cm" fo:margin-top="0.847cm" fo:margin-bottom="0.212cm" style:contextual-spacing="false" fo:orphans="2" fo:widows="2" fo:text-indent="0cm" style:auto-text-indent="false"/>
      <style:text-properties fo:font-variant="normal" fo:text-transform="none" fo:color="#222222" loext:opacity="100%" style:font-name="Noto Sans" fo:font-size="13.5pt" fo:letter-spacing="normal" fo:font-style="normal" fo:font-weight="bold" style:font-weight-asian="bold" style:font-weight-complex="bold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</style:style>
    <style:style style:name="P6" style:family="paragraph" style:parent-style-name="Standard">
      <style:text-properties fo:font-weight="bold" officeooo:rsid="001af4f6" officeooo:paragraph-rsid="001af4f6" style:font-weight-asian="bold" style:font-weight-complex="bold"/>
    </style:style>
    <style:style style:name="T1" style:family="text">
      <style:text-properties fo:font-variant="normal" fo:text-transform="none" fo:color="#222222" loext:opacity="100%" style:font-name="Noto Sans" fo:font-size="12pt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222222" loext:opacity="100%" style:font-name="Noto Sans" fo:font-size="12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222222" loext:opacity="100%" style:font-name="Noto Sans" fo:font-size="12pt" fo:letter-spacing="normal" fo:font-style="normal" fo:font-weight="bold"/>
    </style:style>
    <style:style style:name="T4" style:family="text">
      <style:text-properties fo:font-variant="normal" fo:text-transform="none" fo:color="#222222" loext:opacity="100%" style:font-name="Noto Sans" fo:font-size="12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artnership Proposal: THE CHINOOK &amp; Coolite Bamboo</text:h>
      <text:p text:style-name="P2"><text:span text:style-name="Strong_20_Emphasis"><text:span text:style-name="T1">To:</text:span></text:span><text:span text:style-name="T1"> T.K. Lee Company (Coolite Bamboo)<text:line-break/></text:span><text:span text:style-name="Strong_20_Emphasis"><text:span text:style-name="T1">From:</text:span></text:span><text:span text:style-name="T1"> David Murphy, Team Leader, Chinook Project<text:line-break/></text:span><text:span text:style-name="Strong_20_Emphasis"><text:span text:style-name="T1">Date:</text:span></text:span><text:span text:style-name="T1"> March 2, 2026</text:span></text:p>
      <text:p text:style-name="P2"><text:span text:style-name="Strong_20_Emphasis"><text:span text:style-name="T1">Subject: Material Sponsorship &amp; Official Supplier Partnership</text:span></text:span></text:p>
      <text:p text:style-name="P3">Dear Coolite Bamboo Team,</text:p>
      <text:p text:style-name="P2"><text:span text:style-name="T2">I am writing to formally propose a partnership between the </text:span><text:span text:style-name="Strong_20_Emphasis"><text:span text:style-name="T2">Chinook Project</text:span></text:span><text:span text:style-name="T2"> and </text:span><text:span text:style-name="Strong_20_Emphasis"><text:span text:style-name="T2">Coolite Bamboo</text:span></text:span><text:span text:style-name="T2">. As we move into the prototyping and initial production phase of our sustainable urban pedicab, we recognize Coolite as the premier local source for high-quality, heat-treated bamboo in Vancouver.</text:span></text:p>
      <text:h text:style-name="P4" text:outline-level="3">1. PROJECT OVERVIEW: THE CHINOOK</text:h>
      <text:p text:style-name="P2"><text:span text:style-name="T2">"The Chinook" is a high-performance, carbon-neutral vehicle designed for urban community and economic development. Our chassis features a </text:span><text:span text:style-name="Strong_20_Emphasis"><text:span text:style-name="T2">14-layer laminated bamboo monocoque frame</text:span></text:span><text:span text:style-name="T2"> reinforced with a carbon fiber core, providing a strength-to-weight ratio 40% better than steel. It is designed to carry a </text:span><text:span text:style-name="Strong_20_Emphasis"><text:span text:style-name="T2">300kg (660 lbs) payload</text:span></text:span><text:span text:style-name="T2">, meeting the needs of Vancouver’s tourism, delivery, and taxi sectors.</text:span></text:p>
      <text:h text:style-name="P4" text:outline-level="3">2. PARTNERSHIP OPPORTUNITY</text:h>
      <text:p text:style-name="P2"><text:span text:style-name="T2">We are seeking a </text:span><text:span text:style-name="Strong_20_Emphasis"><text:span text:style-name="T2">Material Sponsorship</text:span></text:span><text:span text:style-name="T2"> for the structural heat-treated bamboo poles required for our initial prototypes. In exchange, we offer:</text:span></text:p>
      <text:list text:style-name="L1">
        <text:list-item>
          <text:p text:style-name="P5"><text:span text:style-name="Strong_20_Emphasis"><text:span text:style-name="T2">Official Material Supplier Status</text:span></text:span><text:span text:style-name="T2">: Coolite Bamboo will be featured prominently in our "Official Build Guide" and project documentation.</text:span></text:p>
        </text:list-item>
        <text:list-item>
          <text:p text:style-name="P5"><text:soft-page-break/><text:span text:style-name="Strong_20_Emphasis"><text:span text:style-name="T2">High-Visibility Exposure</text:span></text:span><text:span text:style-name="T2">: Your materials will be showcased to the Vancouver tourism community and the academic researchers at </text:span><text:span text:style-name="Strong_20_Emphasis"><text:span text:style-name="T2">UBC Forestry</text:span></text:span><text:span text:style-name="T2">.</text:span></text:p>
        </text:list-item>
        <text:list-item>
          <text:p text:style-name="P5"><text:span text:style-name="Strong_20_Emphasis"><text:span text:style-name="T2">Commercial Potential</text:span></text:span><text:span text:style-name="T2">: Following the successful evaluation of our first sample, and pending financing approval, we anticipate an initial production order of </text:span><text:span text:style-name="Strong_20_Emphasis"><text:span text:style-name="T2">10 units</text:span></text:span><text:span text:style-name="T2"> to launch our first tour fleet.</text:span></text:p>
        </text:list-item>
      </text:list>
      <text:h text:style-name="P4" text:outline-level="3">3. THE CHINOOK INFORMATION KIT</text:h>
      <text:p text:style-name="P2"><text:span text:style-name="T2">Attached is our comprehensive </text:span><text:span text:style-name="Strong_20_Emphasis"><text:span text:style-name="T2">Chinook Information Kit</text:span></text:span><text:span text:style-name="T2">, which details our fabrication manual, business plan, and financial projections ($52,600 net potential in 6 months).</text:span></text:p>
      <text:p text:style-name="P2"><text:span text:style-name="Strong_20_Emphasis"><text:span text:style-name="T2">Open the Attached Information Kit here:</text:span></text:span><text:span text:style-name="T2"> [Link to Chinook_Information_Kit.pdf]</text:span></text:p>
      <text:p text:style-name="P3">We would be honored to have Coolite’s decades of expertise anchoring our local supply chain. I will be hand-delivering this information kit tomorrow and look forward to discussing how we can work together to redefine sustainable urban transit in Vancouver.</text:p>
      <text:p text:style-name="P3">Sincerely,</text:p>
      <text:p text:style-name="P2"><text:span text:style-name="Strong_20_Emphasis"><text:span text:style-name="T3">David Murphy</text:span></text:span><text:span text:style-name="T4"><text:line-break/></text:span><text:span text:style-name="T1">Team Leader, Chinook Project<text:line-break/>19-832 East Pender Street<text:line-break/>Vancouver, BC, V6A 1W1<text:line-break/>Phone: (1)778-675-3306</text:span></text:p>
      <text:p text:style-name="P6">daviemurphy@yahoo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, Inter, 'SF Pro', Roboto, 'Helvetica Neue', Helvetica, Tahoma, Arial, 'PingFang SC', 'Microsoft YaHei'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2T11:25:16.112028300</meta:creation-date>
    <meta:print-date>2026-03-02T11:34:10.387259400</meta:print-date>
    <dc:date>2026-03-02T11:35:19.439798800</dc:date>
    <meta:editing-duration>PT10M3S</meta:editing-duration>
    <meta:editing-cycles>1</meta:editing-cycles>
    <meta:document-statistic meta:table-count="0" meta:image-count="0" meta:object-count="0" meta:page-count="2" meta:paragraph-count="19" meta:word-count="329" meta:character-count="2279" meta:non-whitespace-character-count="1972"/>
    <meta:generator>LibreOffice/25.8.3.2$Windows_X86_64 LibreOffice_project/8ca8d55c161d602844f5428fa4b58097424e324e</meta:generator>
  </office:meta>
</office:document-meta>
</file>